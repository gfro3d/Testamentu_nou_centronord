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New,Bold" svg:font-family="CourierNew,Bold" style:font-family-generic="system"/>
  </office:font-face-decls>
  <office:automatic-styles>
    <style:style style:name="P1" style:parent-style-name="Normale" style:master-page-name="MP0" style:family="paragraph">
      <style:paragraph-properties fo:break-before="page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T1152" style:parent-style-name="Car.predefinitoparagrafo" style:family="text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</office:automatic-styles>
  <office:body>
    <office:text text:use-soft-page-breaks="true">
      <text:p text:style-name="P1">1,1 <text:s/>Poiché molti han posto mano a stendere un racconto degli avvenimenti successi tra di noi, <text:s text:c="2"/></text:p>
      <text:p text:style-name="P2">1,2 <text:s/>come ce li hanno trasmessi coloro che ne furono testimoni fin da principio e divennero ministri della parola, <text:s text:c="2"/></text:p>
      <text:p text:style-name="P3">1,3 <text:s/>così ho deciso anch'io di fare ricerche accurate su ogni circostanza fin dagli inizi e di <text:s/>scriverne per te un resoconto ordinato, illustre Teòfilo, <text:s text:c="2"/></text:p>
      <text:p text:style-name="P4">1,4 <text:s/>perché ti possa rendere conto della solidità degli insegnamenti che hai ricevuto. <text:s text:c="2"/></text:p>
      <text:p text:style-name="P5">1,5 <text:s/>Al tempo di Erode, re della Giudea, c'era un sacerdote chiamato Zaccaria, della classe di Abìa, e aveva in moglie una discendente di Aronne chiamata Elisabetta. <text:s text:c="2"/></text:p>
      <text:p text:style-name="P6">1,6 <text:s/>Erano giusti davanti a Dio, osservavano irreprensibili tutte le leggi e le prescrizioni del Signore. <text:s text:c="2"/></text:p>
      <text:p text:style-name="P7">1,7 <text:s/>Ma non avevano figli, perché Elisabetta era sterile e tutti e due erano avanti negli anni. <text:s text:c="2"/></text:p>
      <text:p text:style-name="P8">1,8 <text:s/>Mentre Zaccaria officiava davanti al Signore nel turno della sua classe, <text:s text:c="2"/></text:p>
      <text:p text:style-name="P9">1,9 <text:s/>secondo l'usanza del servizio sacerdotale, gli toccò in sorte di entrare nel tempio per fare l'offerta dell'incenso. <text:s text:c="2"/></text:p>
      <text:p text:style-name="P10">1,10 <text:s/>Tutta l'assemblea del popolo pregava fuori nell'ora dell'incenso. <text:s text:c="2"/></text:p>
      <text:p text:style-name="P11">1,11 <text:s/>Allora gli apparve un angelo del Signore, ritto alla destra dell'altare dell'incenso. <text:s text:c="2"/></text:p>
      <text:p text:style-name="P12">1,12 <text:s/>Quando lo vide, Zaccaria si turbò e fu preso da timore. <text:s text:c="2"/></text:p>
      <text:p text:style-name="P13">1,13 <text:s/>Ma l'angelo gli disse: "Non temere, Zaccaria, la tua preghiera è stata esaudita e tua moglie Elisabetta ti darà un figlio, che chiamerai Giovanni. <text:s text:c="2"/></text:p>
      <text:p text:style-name="P14">1,14 <text:s/>Avrai gioia ed esultanza e molti si rallegreranno della sua nascita, <text:s text:c="2"/></text:p>
      <text:p text:style-name="P15">1,15 <text:s/>poiché egli sarà grande davanti al Signore; non berrà vino né bevande inebrianti, sarà pieno di Spirito Santo fin dal seno di sua madre <text:s text:c="2"/></text:p>
      <text:p text:style-name="P16">1,16 <text:s/>e ricondurrà molti figli d'Israele al Signore loro Dio. <text:s text:c="2"/></text:p>
      <text:p text:style-name="P17">1,17 <text:s/>Gli camminerà innanzi con lo spirito e la forza di Elia, per ricondurre i cuori dei padri verso i figli e i ribelli alla saggezza dei giusti e preparare al Signore un popolo ben disposto". <text:s text:c="2"/></text:p>
      <text:p text:style-name="P18">1,18 <text:s/>Zaccaria disse all'angelo: "Come posso conoscere questo? Io sono vecchio e mia moglie è avanzata negli anni". <text:s text:c="2"/></text:p>
      <text:p text:style-name="P19">1,19 <text:s/>L'angelo gli rispose: "Io sono Gabriele che sto al cospetto di Dio e sono stato mandato a <text:s/>parlarti e a portarti questo lieto annunzio. <text:s text:c="2"/></text:p>
      <text:p text:style-name="P20">1,20 <text:s/>Ed ecco, sarai muto e non potrai parlare fino al giorno in cui queste cose avverranno, perché non hai creduto alle mie parole, le quali si adempiranno a loro tempo". <text:s text:c="2"/></text:p>
      <text:p text:style-name="P21">1,21 <text:s/>Intanto il popolo stava in attesa di Zaccaria, e si meravigliava per il suo indugiare nel tempio. <text:s text:c="2"/></text:p>
      <text:p text:style-name="P22">1,22 <text:s/>Quando poi uscì e non poteva parlare loro, capirono che nel tempio aveva avuto una visione. Faceva loro dei cenni e restava muto. <text:s text:c="2"/></text:p>
      <text:p text:style-name="P23">1,23 <text:s/>Compiuti i giorni del suo servizio, tornò a casa. <text:s text:c="2"/></text:p>
      <text:p text:style-name="P24">1,24 <text:s/>Dopo quei giorni Elisabetta, sua moglie, concepì e si tenne nascosta per cinque mesi e diceva: <text:s text:c="2"/></text:p>
      <text:p text:style-name="P25">1,25 <text:s/>"Ecco che cosa ha fatto per me il Signore, nei giorni in cui si è degnato di togliere la mia vergogna tra gli uomini". <text:s text:c="2"/></text:p>
      <text:p text:style-name="P26">1,26 <text:s/>Nel sesto mese, l'angelo Gabriele fu mandato da Dio in una città della Galilea, chiamata Nazaret, <text:s text:c="2"/></text:p>
      <text:soft-page-break/>
      <text:p text:style-name="P27">1,27 <text:s/>a una vergine, promessa sposa di un uomo della casa di Davide, chiamato Giuseppe. La vergine si chiamava Maria. <text:s text:c="2"/></text:p>
      <text:p text:style-name="P28">1,28 <text:s/>Entrando da lei, disse: "Ti saluto, o piena di grazia, il Signore è con te". <text:s text:c="2"/></text:p>
      <text:p text:style-name="P29">1,29 <text:s/>A queste parole ella rimase turbata e si domandava che senso avesse un tale saluto. <text:s text:c="2"/></text:p>
      <text:p text:style-name="P30">1,30 <text:s/>L'angelo le disse: "Non temere, Maria, perché hai trovato grazia presso Dio. <text:s text:c="2"/></text:p>
      <text:p text:style-name="P31">1,31 <text:s/>Ecco concepirai un figlio, lo darai alla luce e lo chiamerai Gesù. <text:s text:c="2"/></text:p>
      <text:p text:style-name="P32">1,32 <text:s/>Sarà grande e chiamato Figlio dell'Altissimo; il Signore Dio gli darà il trono di Davide suo padre <text:s text:c="2"/></text:p>
      <text:p text:style-name="P33">1,33 <text:s/>e regnerà per sempre sulla casa di Giacobbe e il suo regno non avrà fine". <text:s text:c="2"/></text:p>
      <text:p text:style-name="P34">1,34 <text:s/>Allora Maria disse all'angelo: "Come è possibile? Non conosco uomo". <text:s text:c="2"/></text:p>
      <text:p text:style-name="P35">1,35 <text:s/>Le rispose l'angelo: "Lo Spirito Santo scenderà su di te, su te stenderà la sua ombra la potenza dell'Altissimo. Colui che nascerà sarà dunque santo e chiamato Figlio di Dio. <text:s text:c="2"/></text:p>
      <text:p text:style-name="P36">1,36 <text:s/>Vedi: anche Elisabetta, tua parente, nella sua vecchiaia, ha concepito un figlio e questo è il sesto mese per lei, che tutti dicevano sterile: <text:s text:c="2"/></text:p>
      <text:p text:style-name="P37">1,37 <text:s/>nulla è impossibile a Dio". <text:s text:c="2"/></text:p>
      <text:p text:style-name="P38">1,38 <text:s/>Allora Maria disse: "Eccomi, sono la serva del Signore, avvenga di me quello che hai detto". E l'angelo partì da lei. <text:s text:c="5"/></text:p>
      <text:p text:style-name="P39">1,39 <text:s/>In quei giorni Maria si mise in viaggio verso la montagna e raggiunse in fretta una città di Giuda. <text:s text:c="2"/></text:p>
      <text:p text:style-name="P40">1,40 <text:s/>Entrata nella casa di Zaccaria, salutò Elisabetta. <text:s text:c="2"/></text:p>
      <text:p text:style-name="P41">1,41 <text:s/>Appena Elisabetta ebbe udito il saluto di Maria, il bambino le sussultò nel grembo. Elisabetta fu piena di Spirito Santo <text:s text:c="2"/></text:p>
      <text:p text:style-name="P42">1,42 <text:s/>ed esclamò a gran voce: "Benedetta tu fra le donne e benedetto il frutto del tuo grembo! <text:s text:c="2"/></text:p>
      <text:p text:style-name="P43">1,43 <text:s/>A che debbo che la madre del mio Signore venga a me? <text:s text:c="2"/></text:p>
      <text:p text:style-name="P44">1,44 <text:s/>Ecco, appena la voce del tuo saluto è giunta ai miei orecchi, il bambino ha esultato di gioia nel mio grembo. <text:s text:c="2"/></text:p>
      <text:p text:style-name="P45">1,45 <text:s/>E beata colei che ha creduto nell'adempimento delle parole del Signore". <text:s text:c="2"/></text:p>
      <text:p text:style-name="P46">1,46 <text:s/>Allora Maria disse: "L'anima mia magnifica il Signore <text:s text:c="2"/></text:p>
      <text:p text:style-name="P47">1,47 <text:s/>e il mio spirito esulta in Dio, mio salvatore, <text:s text:c="2"/></text:p>
      <text:p text:style-name="P48">1,48 <text:s/>perché ha guardato l'umiltà della sua serva. D'ora in poi tutte le generazioni mi chiameranno beata. <text:s text:c="2"/></text:p>
      <text:p text:style-name="P49">1,49 <text:s/>Grandi cose ha fatto in me l'Onnipotente e Santo è il suo nome: <text:s text:c="2"/></text:p>
      <text:p text:style-name="P50">1,50 <text:s/>di generazione in generazione la sua misericordia si stende su quelli che lo temono. <text:s text:c="2"/></text:p>
      <text:p text:style-name="P51">1,51 <text:s/>Ha spiegato la potenza del suo braccio, ha disperso i superbi nei pensieri del loro cuore; <text:s text:c="2"/></text:p>
      <text:p text:style-name="P52">1,52 <text:s/>ha rovesciato i potenti dai troni, ha innalzato gli umili; <text:s text:c="2"/></text:p>
      <text:p text:style-name="P53">1,53 <text:s/>ha ricolmato di beni gli affamati, ha rimandato i ricchi a mani vuote. <text:s text:c="2"/></text:p>
      <text:p text:style-name="P54">1,54 <text:s/>Ha soccorso Israele, suo servo, ricordandosi della sua misericordia, <text:s text:c="2"/></text:p>
      <text:p text:style-name="P55">1,55 <text:s/>come aveva promesso ai nostri padri, ad Abramo e alla sua discendenza, per sempre". <text:s text:c="2"/></text:p>
      <text:p text:style-name="P56">1,56 <text:s/>Maria rimase con lei circa tre mesi, poi tornò a casa sua. <text:s text:c="2"/></text:p>
      <text:soft-page-break/>
      <text:p text:style-name="P57">1,57 <text:s/>Per Elisabetta intanto si compì il tempo del parto e diede alla luce un figlio. <text:s text:c="2"/></text:p>
      <text:p text:style-name="P58">1,58 <text:s/>I vicini e i parenti udirono che il Signore aveva esaltato in lei la sua misericordia, e si rallegravano con lei. <text:s text:c="2"/></text:p>
      <text:p text:style-name="P59">1,59 <text:s/>All'ottavo giorno vennero per circoncidere il bambino e volevano chiamarlo col nome di suo padre, Zaccaria. <text:s text:c="2"/></text:p>
      <text:p text:style-name="P60">1,60 <text:s/>Ma sua madre intervenne: "No, si chiamerà Giovanni". <text:s text:c="2"/></text:p>
      <text:p text:style-name="P61">1,61 <text:s/>Le dissero: "Non c'è nessuno della tua parentela che si chiami con questo nome". <text:s text:c="2"/></text:p>
      <text:p text:style-name="P62">1,62 <text:s/>Allora domandavano con cenni a suo padre come voleva che si chiamasse. <text:s text:c="2"/></text:p>
      <text:p text:style-name="P63">1,63 <text:s/>Egli chiese una tavoletta, e scrisse: "Giovanni è il suo nome". Tutti furono meravigliati. <text:s text:c="2"/></text:p>
      <text:p text:style-name="P64">1,64 <text:s/>In quel medesimo istante gli si aprì la bocca e gli si sciolse la lingua, e parlava benedicendo Dio. <text:s text:c="2"/></text:p>
      <text:p text:style-name="P65">1,65 <text:s/>Tutti i loro vicini furono presi da timore, e per tutta la regione montuosa della Giudea si discorreva di tutte queste cose. <text:s text:c="2"/></text:p>
      <text:p text:style-name="P66">1,66 <text:s/>Coloro che le udivano, le serbavano in cuor loro: "Che sarà mai questo bambino?" si dicevano. E davvero la mano del Signore stava con lui. <text:s text:c="2"/></text:p>
      <text:p text:style-name="P67">1,67 <text:s/>Zaccaria, suo padre, fu pieno di Spirito Santo, e profetò dicendo: <text:s text:c="2"/></text:p>
      <text:p text:style-name="P68">1,68 <text:s/>"Benedetto il Signore Dio d'Israele, perché ha visitato e redento il suo popolo, <text:s text:c="2"/></text:p>
      <text:p text:style-name="P69">1,69 <text:s/>e ha suscitato per noi una salvezza potente nella casa di Davide, suo servo, <text:s text:c="2"/></text:p>
      <text:p text:style-name="P70">1,70 <text:s/>come aveva promesso per bocca dei suoi santi profeti d'un tempo: <text:s text:c="2"/></text:p>
      <text:p text:style-name="P71">1,71 <text:s/>salvezza dai nostri nemici, e dalle mani di quanti ci odiano. <text:s text:c="2"/></text:p>
      <text:p text:style-name="P72">1,72 <text:s/>Così egli ha concesso misericordia ai nostri padri e si è ricordato della sua santa alleanza, <text:s text:c="2"/></text:p>
      <text:p text:style-name="P73">1,73 <text:s/>del giuramento fatto ad Abramo, nostro padre, <text:s text:c="2"/></text:p>
      <text:p text:style-name="P74">1,74 <text:s/>di concederci, liberati dalle mani dei nemici, di servirlo senza timore, <text:s text:c="2"/></text:p>
      <text:p text:style-name="P75">1,75 <text:s/>in santità e giustizia al suo cospetto, per tutti i nostri giorni. <text:s text:c="2"/></text:p>
      <text:p text:style-name="P76">1,76 <text:s/>E tu, bambino, sarai chiamato profeta dell'Altissimo perché andrai innanzi al Signore a <text:s/>preparargli le strade, <text:s text:c="2"/></text:p>
      <text:p text:style-name="P77">1,77 <text:s/>per dare al suo popolo la conoscenza della salvezza nella remissione dei suoi peccati, <text:s text:c="2"/></text:p>
      <text:p text:style-name="P78">1,78 <text:s/>grazie alla bontà misericordiosa del nostro Dio, per cui verrà a visitarci dall'alto un sole che sorge <text:s text:c="2"/></text:p>
      <text:p text:style-name="P79">1,79 <text:s/>per rischiarare quelli che stanno nelle tenebre e nell'ombra della morte e dirigere i nostri passi sulla via della pace". <text:s text:c="4"/></text:p>
      <text:p text:style-name="P80">1,80 <text:s/>Il fanciullo cresceva e si fortificava nello spirito. Visse in regioni deserte fino al giorno della sua manifestazione a Israele. <text:s text:c="2"/></text:p>
      <text:p text:style-name="P81">2,1 <text:s/>In quei giorni un decreto di Cesare Augusto ordinò che si facesse il censimento di tutta la terra. <text:s text:c="2"/></text:p>
      <text:p text:style-name="P82">2,2 <text:s/>Questo primo censimento fu fatto quando era governatore della Siria Quirinio. <text:s text:c="2"/></text:p>
      <text:p text:style-name="P83">2,3 <text:s/>Andavano tutti a farsi registrare, ciascuno nella sua città. <text:s text:c="2"/></text:p>
      <text:p text:style-name="P84">2,4 <text:s/>Anche Giuseppe, che era della casa e della famiglia di Davide, dalla città di Nazaret e dalla Galilea salì in Giudea alla città di Davide, chiamata Betlemme, <text:s text:c="2"/></text:p>
      <text:p text:style-name="P85">2,5 <text:s/>per farsi registrare insieme con Maria sua sposa, che era incinta. <text:s text:c="2"/></text:p>
      <text:p text:style-name="P86">2,6 <text:s/>Ora, mentre si trovavano in quel luogo, si compirono per lei i giorni del parto. <text:s text:c="2"/></text:p>
      <text:soft-page-break/>
      <text:p text:style-name="P87">2,7 <text:s/>Diede alla luce il suo figlio primogenito, lo avvolse in fasce e lo depose in una mangiatoia, perché non c'era posto per loro nell'albergo. <text:s text:c="2"/></text:p>
      <text:p text:style-name="P88">2,8 <text:s/>C'erano in quella regione alcuni pastori che vegliavano di notte facendo la guardia al loro gregge. <text:s text:c="2"/></text:p>
      <text:p text:style-name="P89">2,9 <text:s/>Un angelo del Signore si presentò davanti a loro e la gloria del Signore li avvolse di e. Essi furono presi da grande spavento, <text:s text:c="2"/></text:p>
      <text:p text:style-name="P90">2,10 <text:s/>ma l'angelo disse loro: "Non temete, ecco vi annunzio una grande gioia, che sarà di tutto il popolo: <text:s text:c="2"/></text:p>
      <text:p text:style-name="P91">2,11 <text:s/>oggi vi è nato nella città di Davide un salvatore, che è il Cristo Signore. <text:s text:c="2"/></text:p>
      <text:p text:style-name="P92">2,12 <text:s/>Questo per voi il segno: troverete un bambino avvolto in fasce, che giace in una mangiatoia". <text:s text:c="2"/></text:p>
      <text:p text:style-name="P93">2,13 <text:s/>E subito apparve con l'angelo una moltitudine dell'esercito celeste che lodava Dio e diceva: <text:s text:c="2"/></text:p>
      <text:p text:style-name="P94">2,14 <text:s/>"Gloria a Dio nel più alto dei cieli e pace in terra agli uomini che egli ama". <text:s text:c="2"/></text:p>
      <text:p text:style-name="P95">2,15 <text:s/>Appena gli angeli si furono allontanati per tornare al cielo, i pastori dicevano fra loro: <text:s/>"Andiamo fino a Betlemme, vediamo questo avvenimento che il Signore ci ha fatto conoscere". <text:s text:c="2"/></text:p>
      <text:p text:style-name="P96">2,16 <text:s/>Andarono dunque senz'indugio e trovarono Maria e Giuseppe e il bambino, che giaceva nella <text:s/>mangiatoia. <text:s text:c="2"/></text:p>
      <text:p text:style-name="P97">2,17 <text:s/>E dopo averlo visto, riferirono ciò che del bambino era stato detto loro. <text:s text:c="2"/></text:p>
      <text:p text:style-name="P98">2,18 <text:s/>Tutti quelli che udirono, si stupirono delle cose che i pastori dicevano. <text:s text:c="2"/></text:p>
      <text:p text:style-name="P99">2,19 <text:s/>Maria, da parte sua, serbava tutte queste cose meditandole nel suo cuore. <text:s text:c="2"/></text:p>
      <text:p text:style-name="P100">2,20 <text:s/>I pastori poi se ne tornarono, glorificando e lodando Dio per tutto quello che avevano udito e visto, com'era stato detto loro. <text:s text:c="2"/></text:p>
      <text:p text:style-name="P101">2,21 <text:s/>Quando furon passati gli otto giorni prescritti per la circoncisione, gli fu messo nome Gesù, come era stato chiamato dall'angelo prima di essere concepito nel grembo della madre. <text:s text:c="2"/></text:p>
      <text:p text:style-name="P102">2,22 <text:s/>Quando venne il tempo della loro purificazione secondo la Legge di Mosè, portarono il bambino a Gerusalemme per offrirlo al Signore, <text:s text:c="2"/></text:p>
      <text:p text:style-name="P103">2,23 <text:s/>come è scritto nella Legge del Signore: Ogni maschio primogenito sarà sacro al Signore; <text:s text:c="2"/></text:p>
      <text:p text:style-name="P104">2,24 <text:s/>e per offrire in sacrificio una coppia di tortore o di giovani colombi, come prescrive la Legge del Signore. <text:s text:c="2"/></text:p>
      <text:p text:style-name="P105">2,25 <text:s/>Ora a Gerusalemme c'era un uomo di nome Simeone, uomo giusto e timorato di Dio, che aspettava il conforto d'Israele; <text:s text:c="2"/></text:p>
      <text:p text:style-name="P106">2,26 <text:s/>lo Spirito Santo che era su di lui, gli aveva preannunziato che non avrebbe visto la morte senza prima aver veduto il Messia del Signore. <text:s text:c="2"/></text:p>
      <text:p text:style-name="P107">2,27 <text:s/>Mosso dunque dallo Spirito, si recò al tempio; e mentre i genitori vi portavano il bambino Gesù per adempiere la Legge, <text:s text:c="2"/></text:p>
      <text:p text:style-name="P108">2,28 <text:s/>lo prese tra le braccia e benedisse Dio: <text:s text:c="2"/></text:p>
      <text:p text:style-name="P109">2,29 <text:s/>"Ora lascia, o Signore, che il tuo servo vada in pace secondo la tua parola; <text:s text:c="2"/></text:p>
      <text:p text:style-name="P110">2,30 <text:s/>perché i miei occhi han visto la tua salvezza, <text:s text:c="2"/></text:p>
      <text:p text:style-name="P111">2,31 <text:s/>preparata da te davanti a tutti i popoli, <text:s text:c="2"/></text:p>
      <text:p text:style-name="P112">2,32 <text:s/>luce per illuminare le genti e gloria del tuo popolo Israele". <text:s text:c="2"/></text:p>
      <text:p text:style-name="P113">2,33 <text:s/>Il padre e la madre di Gesù si stupivano delle cose che si dicevano di lui. <text:s text:c="2"/></text:p>
      <text:soft-page-break/>
      <text:p text:style-name="P114">2,34 <text:s/>Simeone li benedisse e parlò a Maria, sua madre: "Egli è qui per la rovina e la risurrezione di molti in Israele, segno di contraddizione <text:s text:c="2"/></text:p>
      <text:p text:style-name="P115">2,35 <text:s/>perché siano svelati i pensieri di molti cuori. E anche a te una spada trafiggerà l'anima". <text:s text:c="2"/></text:p>
      <text:p text:style-name="P116">2,36 <text:s/>C'era anche una profetessa, Anna, figlia di Fanuèle, della tribù di Aser. Era molto avanzata in età, aveva vissuto col marito sette anni dal tempo in cui era ragazza, <text:s text:c="2"/></text:p>
      <text:p text:style-name="P117">2,37 <text:s/>era poi rimasta vedova e ora aveva ottantaquattro anni. Non si allontanava mai dal tempio, servendo Dio notte e giorno con digiuni e preghiere. <text:s text:c="2"/></text:p>
      <text:p text:style-name="P118">2,38 <text:s/>Sopraggiunta in quel momento, si mise anche lei a lodare Dio e parlava del bambino a quanti aspettavano la redenzione di Gerusalemme. <text:s text:c="2"/></text:p>
      <text:p text:style-name="P119">2,39 <text:s/>Quando ebbero tutto compiuto secondo la Legge del Signore, fecero ritorno in Galilea, alla loro città di Nazaret. <text:s text:c="2"/></text:p>
      <text:p text:style-name="P120">2,40 <text:s/>Il bambino cresceva e si fortificava, pieno di sapienza, e la grazia di Dio era sopra di lui. <text:s text:c="2"/></text:p>
      <text:p text:style-name="P121">2,41 <text:s/>I suoi genitori si recavano tutti gli anni a Gerusalemme per la festa di Pasqua. <text:s text:c="2"/></text:p>
      <text:p text:style-name="P122">2,42 <text:s/>Quando egli ebbe dodici anni, vi salirono di nuovo secondo l'usanza; <text:s text:c="2"/></text:p>
      <text:p text:style-name="P123">2,43 <text:s/>ma trascorsi i giorni della festa, mentre riprendevano la via del ritorno, il fanciullo Gesù rimase a Gerusalemme, senza che i genitori se ne accorgessero. <text:s text:c="2"/></text:p>
      <text:p text:style-name="P124">2,44 <text:s/>Credendolo nella carovana, fecero una giornata di viaggio, e poi si misero a cercarlo tra i parenti e i conoscenti; <text:s text:c="2"/></text:p>
      <text:p text:style-name="P125">2,45 <text:s/>non avendolo trovato, tornarono in cerca di lui a Gerusalemme. <text:s text:c="2"/></text:p>
      <text:p text:style-name="P126">2,46 <text:s/>Dopo tre giorni lo trovarono nel tempio, seduto in mezzo ai dottori, mentre li ascoltava e li interrogava. <text:s text:c="2"/></text:p>
      <text:p text:style-name="P127">2,47 <text:s/>E tutti quelli che l'udivano erano pieni di stupore per la sua intelligenza e le sue risposte. <text:s text:c="2"/></text:p>
      <text:p text:style-name="P128">2,48 <text:s/>Al vederlo restarono stupiti e sua madre gli disse: "Figlio, perché ci hai fatto così? Ecco, tuo padre e io, angosciati, ti cercavamo". <text:s text:c="2"/></text:p>
      <text:p text:style-name="P129">2,49 <text:s/>Ed egli rispose: "Perché mi cercavate? Non sapevate che io devo occuparmi delle cose del Padre mio?". <text:s text:c="2"/></text:p>
      <text:p text:style-name="P130">2,50 <text:s/>Ma essi non compresero le sue parole. <text:s text:c="2"/></text:p>
      <text:p text:style-name="P131">2,51 <text:s/>Partì dunque con loro e tornò a Nazaret e stava loro sottomesso. Sua madre serbava tutte queste cose nel suo cuore. <text:s text:c="2"/></text:p>
      <text:p text:style-name="P132">2,52 <text:s/>E Gesù cresceva in sapienza, età e grazia davanti a Dio e agli uomini. <text:s text:c="2"/></text:p>
      <text:p text:style-name="P133">3,1 <text:s/>Nell'anno decimoquinto dell'impero di Tiberio Cesare, mentre Ponzio Pilato era governatore della Giudea, Erode tetrarca della Galilea, e Filippo, suo fratello, tetrarca dell'Iturèa e della Traconìtide, e Lisània tetrarca dell'Abilène, <text:s text:c="2"/></text:p>
      <text:p text:style-name="P134">3,2 <text:s/>sotto i sommi sacerdoti Anna e Caifa, la parola di Dio scese su Giovanni, figlio di Zaccaria, nel deserto. <text:s text:c="2"/></text:p>
      <text:p text:style-name="P135">3,3 <text:s/>Ed egli percorse tutta la regione del Giordano, predicando un battesimo di conversione per il perdono dei peccati, <text:s text:c="2"/></text:p>
      <text:p text:style-name="P136">3,4 <text:s/>com'è scritto nel libro degli oracoli del profeta Isaia: Voce di uno che grida nel deserto: Preparate la via del Signore, raddrizzate i suoi sentieri! <text:s text:c="2"/></text:p>
      <text:p text:style-name="P137">3,5 <text:s/>Ogni burrone sia riempito, ogni monte e ogni colle sia abbassato; i passi tortuosi siano diritti; i luoghi impervi spianati. <text:s text:c="2"/></text:p>
      <text:p text:style-name="P138">3,6 <text:s/>Ogni uomo vedrà la salvezza di Dio! <text:s text:c="2"/></text:p>
      <text:p text:style-name="P139">3,7 <text:s/>Diceva dunque alle folle che andavano a farsi battezzare da lui: "Razza di vipere, chi vi ha insegnato a sfuggire all'ira imminente? <text:s text:c="2"/></text:p>
      <text:soft-page-break/>
      <text:p text:style-name="P140">3,8 <text:s/>Fate dunque opere degne della conversione e non cominciate a dire in voi stessi: Abbiamo Abramo per padre! Perché io vi dico che Dio può far nascere figli ad Abramo anche da queste pietre. <text:s text:c="2"/></text:p>
      <text:p text:style-name="P141">3,9 <text:s/>Anzi, la scure è già posta alla radice degli alberi; ogni albero che non porta buon frutto, sarà tagliato e buttato nel fuoco". <text:s text:c="2"/></text:p>
      <text:p text:style-name="P142">3,10 <text:s/>Le folle lo interrogavano: "Che cosa dobbiamo fare?". <text:s text:c="2"/></text:p>
      <text:p text:style-name="P143">3,11 <text:s/>Rispondeva: "Chi ha due tuniche, ne dia una a chi non ne ha; e chi ha da mangiare, faccia <text:s/>altrettanto". <text:s text:c="2"/></text:p>
      <text:p text:style-name="P144">3,12 <text:s/>Vennero anche dei pubblicani a farsi battezzare, e gli chiesero: "Maestro, che dobbiamo fare?". <text:s text:c="2"/></text:p>
      <text:p text:style-name="P145">3,13 <text:s/>Ed egli disse loro: "Non esigete nulla di più di quanto vi è stato fissato". <text:s text:c="2"/></text:p>
      <text:p text:style-name="P146">3,14 <text:s/>Lo interrogavano anche alcuni soldati: "E noi che dobbiamo fare?". Rispose: "Non maltrattate e non estorcete niente a nessuno, contentatevi delle vostre paghe". <text:s text:c="2"/></text:p>
      <text:p text:style-name="P147">3,15 <text:s/>Poiché il popolo era in attesa e tutti si domandavano in cuor loro, riguardo a Giovanni, se non fosse lui il Cristo, <text:s text:c="2"/></text:p>
      <text:p text:style-name="P148">3,16 <text:s/>Giovanni rispose a tutti dicendo: "Io vi battezzo con acqua; ma viene uno che è più forte di me, al quale io non son degno di sciogliere neppure il legaccio dei sandali: costui vi battezzerà in Spirito Santo e fuoco. <text:s text:c="2"/></text:p>
      <text:p text:style-name="P149">3,17 <text:s/>Egli ha in mano il ventilabro per ripulire la sua aia e per raccogliere il frumento nel granaio; ma la pula, la brucerà con fuoco inestinguibile". <text:s text:c="2"/></text:p>
      <text:p text:style-name="P150">3,18 <text:s/>Con molte altre esortazioni annunziava al popolo la buona novella. <text:s text:c="2"/></text:p>
      <text:p text:style-name="P151">3,19 <text:s/>Ma il tetrarca Erode, biasimato da lui a causa di Erodìade, moglie di suo fratello, e per tutte le scelleratezze che aveva commesso, <text:s text:c="2"/></text:p>
      <text:p text:style-name="P152">3,20 <text:s/>aggiunse alle altre anche questa: fece rinchiudere Giovanni in prigione. <text:s text:c="2"/></text:p>
      <text:p text:style-name="P153">3,21 <text:s/>Quando tutto il popolo fu battezzato e mentre Gesù, ricevuto anche lui il battesimo, stava in preghiera, il cielo si aprì <text:s text:c="2"/></text:p>
      <text:p text:style-name="P154"><text:s text:c="2"/>3,22 <text:s/>e scese su di lui lo Spirito Santo in apparenza corporea, come di colomba, e vi fu una voce dal cielo: "Tu sei il mio figlio prediletto, in te mi sono compiaciuto". <text:s text:c="2"/></text:p>
      <text:p text:style-name="P155">3,23 <text:s/>Gesù quando incominciò il suo ministero aveva circa trent'anni ed era figlio, come si credeva, di Giuseppe, figlio di Eli, <text:s text:c="2"/></text:p>
      <text:p text:style-name="P156">3,24 <text:s/>figlio di Mattat, figlio di Levi, figlio di Melchi, figlio di Innai, figlio di Giuseppe, <text:s text:c="2"/></text:p>
      <text:p text:style-name="P157">3,25 <text:s/>figlio di Mattatìa, figlio di Amos, figlio di Naum, figlio di Esli, figlio di Naggai, <text:s text:c="2"/></text:p>
      <text:p text:style-name="P158">3,26 <text:s/>figlio di Maat, figlio di Mattatia, figlio di Semein, figlio di Iosek, figlio di Ioda, <text:s text:c="2"/></text:p>
      <text:p text:style-name="P159">3,27 <text:s/>figlio di Ioanan, figlio di Resa, figlio di Zorobabele, figlio di Salatiel, figlio di Neri, <text:s text:c="2"/></text:p>
      <text:p text:style-name="P160">3,28 <text:s/>figlio di Melchi, figlio di Addi, figlio di Cosam, figlio di Elmadam, figlio di Er, <text:s text:c="2"/></text:p>
      <text:p text:style-name="P161">3,29 <text:s/>figlio di Gesù, figlio di Eliezer, figlio di Iorim, figlio di Mattat, figlio di Levi, <text:s text:c="2"/></text:p>
      <text:p text:style-name="P162">3,30 <text:s/>figlio di Simeone, figlio di Giuda, figlio di Giuseppe, figlio di Ionam, figlio di Eliacim, <text:s text:c="2"/></text:p>
      <text:p text:style-name="P163">3,31 <text:s/>figlio di Melea, figlio di Menna, figlio di Mattata, figlio di Natam, figlio di Davide, <text:s text:c="2"/></text:p>
      <text:p text:style-name="P164">3,32 <text:s/>figlio di Iesse, figlio di Obed, figlio di Booz, figlio di Sala, figlio di Naasson, <text:s text:c="2"/></text:p>
      <text:soft-page-break/>
      <text:p text:style-name="P165">3,33 <text:s/>figlio di Aminadab, figlio di Admin, figlio di Arni, figlio di Esrom, figlio di Fares, figlio di Giuda, <text:s text:c="2"/></text:p>
      <text:p text:style-name="P166">3,34 <text:s/>figlio di Giacobbe, figlio di Isacco, figlio di Abramo, figlio di Tare, figlio di Nacor, <text:s text:c="2"/></text:p>
      <text:p text:style-name="P167">3,35 <text:s/>figlio di Seruk, figlio di Ragau, figlio di Falek, figlio di Eber, figlio di Sala, <text:s text:c="2"/></text:p>
      <text:p text:style-name="P168">3,36 <text:s/>figlio di Cainam, figlio di Arfacsad, figlio di Sem, figlio di Noè, figlio di Lamech, <text:s text:c="2"/></text:p>
      <text:p text:style-name="P169">3,37 <text:s/>figlio di Matusalemme, figlio di Enoch, figlio di Iaret, figlio di Malleel, figlio di Cainam, <text:s text:c="2"/></text:p>
      <text:p text:style-name="P170">3,38 <text:s/>figlio di Enos, figlio di Set, figlio di Adamo, figlio di Dio. <text:s text:c="2"/></text:p>
      <text:p text:style-name="P171">4,1 <text:s/>Gesù, pieno di Spirito Santo, si allontanò dal Giordano e fu condotto dallo Spirito nel deserto <text:s text:c="2"/></text:p>
      <text:p text:style-name="P172">4,2 <text:s/>dove, per quaranta giorni, fu tentato dal diavolo. Non mangiò nulla in quei giorni; ma quando furono terminati ebbe fame. <text:s text:c="2"/></text:p>
      <text:p text:style-name="P173">4,3 <text:s/>Allora il diavolo gli disse: "Se tu sei Figlio di Dio, di' a questa pietra che diventi pane". <text:s text:c="2"/></text:p>
      <text:p text:style-name="P174"><text:s text:c="2"/>4,4 <text:s/>Gesù gli rispose: "Sta scritto: Non di solo pane vivrà l'uomo". <text:s text:c="2"/></text:p>
      <text:p text:style-name="P175">4,5 <text:s/>Il diavolo lo condusse in alto e, mostrandogli in un istante tutti i regni della terra, gli disse: <text:s text:c="2"/></text:p>
      <text:p text:style-name="P176">4,6 <text:s/>"Ti darò tutta questa potenza e la gloria di questi regni, perché è stata messa nelle mie mani e io la do a chi voglio. <text:s text:c="2"/></text:p>
      <text:p text:style-name="P177">4,7 <text:s/>Se ti prostri dinanzi a me tutto sarà tuo". <text:s text:c="2"/></text:p>
      <text:p text:style-name="P178">4,8 <text:s/>Gesù gli rispose: "Sta scritto: Solo al Signore Dio tuo ti prostrerai, lui solo adorerai". <text:s text:c="2"/></text:p>
      <text:p text:style-name="P179">4,9 <text:s/>Lo condusse a Gerusalemme, lo pose sul pinnacolo del tempio e gli disse: "Se tu sei Figlio di Dio, buttati giù; <text:s text:c="2"/></text:p>
      <text:p text:style-name="P180">4,10 <text:s/>sta scritto infatti: Ai suoi angeli darà ordine per te, perché essi ti custodiscano; <text:s text:c="2"/></text:p>
      <text:p text:style-name="P181">4,11 <text:s/>e anche: essi ti sosterranno con le mani, perché il tuo piede non inciampi in una pietra". <text:s text:c="2"/></text:p>
      <text:p text:style-name="P182">4,12 <text:s/>Gesù gli rispose: "È stato detto: Non tenterai il Signore Dio tuo". <text:s text:c="2"/></text:p>
      <text:p text:style-name="P183">4,13 <text:s/>Dopo aver esaurito ogni specie di tentazione, il diavolo si allontanò da lui per ritornare al tempo fissato. <text:s text:c="2"/></text:p>
      <text:p text:style-name="P184">4,14 <text:s/>Gesù ritornò in Galilea con la potenza dello Spirito Santo e la sua fama si diffuse in tutta la regione. <text:s text:c="2"/></text:p>
      <text:p text:style-name="P185">4,15 <text:s/>Insegnava nelle loro sinagoghe e tutti ne facevano grandi lodi. <text:s text:c="2"/></text:p>
      <text:p text:style-name="P186">4,16 <text:s/>Si recò a Nazaret, dove era stato allevato; ed entrò, secondo il suo solito, di sabato nella sinagoga e si alzò a leggere. <text:s text:c="2"/></text:p>
      <text:p text:style-name="P187">4,17 <text:s/>Gli fu dato il rotolo del profeta Isaia; apertolo trovò il passo dove era scritto: <text:s text:c="2"/></text:p>
      <text:p text:style-name="P188">4,18 <text:s/>Lo Spirito del Signore è sopra di me; per questo mi ha consacrato con l'unzione, e mi ha mandato per annunziare ai poveri un lieto messaggio, per proclamare ai prigionieri la liberazione e ai ciechi la vista; per rimettere in libertà gli oppressi, <text:s text:c="2"/></text:p>
      <text:p text:style-name="P189">4,19 <text:s/>e predicare un anno di grazia del Signore. <text:s text:c="2"/></text:p>
      <text:p text:style-name="P190">4,20 <text:s/>Poi arrotolò il volume, lo consegnò all'inserviente e sedette. Gli occhi di tutti nella sinagoga stavano fissi sopra di lui. <text:s text:c="2"/></text:p>
      <text:soft-page-break/>
      <text:p text:style-name="P191">4,21 <text:s/>Allora cominciò a dire: "Oggi si è adempiuta questa Scrittura che voi avete udita con i vostri orecchi". <text:s text:c="2"/></text:p>
      <text:p text:style-name="P192">4,22 <text:s/>Tutti gli rendevano testimonianza ed erano meravigliati delle parole di grazia che uscivano dalla sua bocca e dicevano: "Non è il figlio di Giuseppe?". <text:s text:c="2"/></text:p>
      <text:p text:style-name="P193">4,23 <text:s/>Ma egli rispose: "Di certo voi mi citerete il proverbio: Medico, cura te stesso. Quanto abbiamo udito che accadde a Cafarnao, fàllo anche qui, nella tua patria!". <text:s text:c="2"/></text:p>
      <text:p text:style-name="P194">4,24 <text:s/>Poi aggiunse: "Nessun profeta è bene accetto in patria. <text:s text:c="2"/></text:p>
      <text:p text:style-name="P195">4,25 <text:s/>Vi dico anche: c'erano molte vedove in Israele al tempo di Elia, quando il cielo fu chiuso per tre anni e sei mesi e ci fu una grande carestia in tutto il paese; <text:s text:c="2"/></text:p>
      <text:p text:style-name="P196">4,26 <text:s/>ma a nessuna di esse fu mandato Elia, se non a una vedova in Sarepta di Sidone. <text:s text:c="2"/></text:p>
      <text:p text:style-name="P197">4,27 <text:s/>C'erano molti lebbrosi in Israele al tempo del profeta Eliseo, ma nessuno di loro fu risanato se non Naaman, il Siro". <text:s text:c="2"/></text:p>
      <text:p text:style-name="P198">4,28 <text:s/>All'udire queste cose, tutti nella sinagoga furono pieni di sdegno; <text:s text:c="2"/></text:p>
      <text:p text:style-name="P199">4,29 <text:s/>si levarono, lo cacciarono fuori della città e lo condussero fin sul ciglio del monte sul quale la loro città era situata, per gettarlo giù dal precipizio. <text:s text:c="2"/></text:p>
      <text:p text:style-name="P200">4,30 <text:s/>Ma egli, passando in mezzo a loro, se ne andò. <text:s text:c="2"/></text:p>
      <text:p text:style-name="P201">4,31 <text:s/>Poi discese a Cafarnao, una città della Galilea, e il sabato ammaestrava la gente. <text:s text:c="2"/></text:p>
      <text:p text:style-name="P202">4,32 <text:s/>Rimanevano colpiti dal suo insegnamento, perché parlava con autorità. <text:s text:c="2"/></text:p>
      <text:p text:style-name="P203">4,33 <text:s/>Nella sinagoga c'era un uomo con un demonio immondo e cominciò a gridare forte: <text:s text:c="2"/></text:p>
      <text:p text:style-name="P204">4,34 <text:s/>"Basta! Che abbiamo a che fare con te, Gesù Nazareno? Sei venuto a rovinarci? So bene chi sei: il Santo di Dio!". <text:s text:c="2"/></text:p>
      <text:p text:style-name="P205">4,35 <text:s/>Gesù gli intimò: "Taci, esci da costui!". E il demonio, gettatolo a terra in mezzo alla gente, uscì da lui, senza fargli alcun male. <text:s text:c="2"/></text:p>
      <text:p text:style-name="P206">4,36 <text:s/>Tutti furono presi da paura e si dicevano l'un l'altro: "Che parola è mai questa, che comanda con autorità e potenza agli spiriti immondi ed essi se ne vanno?". <text:s text:c="2"/></text:p>
      <text:p text:style-name="P207">4,37 <text:s/>E si diffondeva la fama di lui in tutta la regione. <text:s text:c="2"/></text:p>
      <text:p text:style-name="P208">4,38 <text:s/>Uscito dalla sinagoga entrò nella casa di Simone. La suocera di Simone era in preda a una grande febbre e lo pregarono per lei. <text:s text:c="2"/></text:p>
      <text:p text:style-name="P209">4,39 <text:s/>Chinatosi su di lei, intimò alla febbre, e la febbre la lasciò. Levatasi all'istante, la donna cominciò a servirli. <text:s text:c="2"/></text:p>
      <text:p text:style-name="P210">4,40 <text:s/>Al calar del sole, tutti quelli che avevano infermi colpiti da mali di ogni genere li condussero a lui. Ed egli, imponendo su ciascuno le mani, li guariva. <text:s text:c="2"/></text:p>
      <text:p text:style-name="P211">4,41 <text:s/>Da molti uscivano demòni gridando: "Tu sei il Figlio di Dio!". Ma egli li minacciava e non li lasciava parlare, perché sapevano che era il Cristo. <text:s text:c="2"/></text:p>
      <text:p text:style-name="P212">4,42 <text:s/>Sul far del giorno uscì e si recò in un luogo deserto. Ma le folle lo cercavano, lo raggiunsero e volevano trattenerlo perché non se ne andasse via da loro. <text:s text:c="2"/></text:p>
      <text:p text:style-name="P213">4,43 <text:s/>Egli però disse: "Bisogna che io annunzi il regno di Dio anche alle altre città; per questo sono stato mandato". <text:s text:c="2"/></text:p>
      <text:p text:style-name="P214">4,44 <text:s/>E andava predicando nelle sinagoghe della Giudea. <text:s text:c="2"/></text:p>
      <text:p text:style-name="P215">5,1 <text:s/>Un giorno, mentre, levato in piedi, stava presso il lago di Genèsaret <text:s text:c="2"/></text:p>
      <text:p text:style-name="P216">5,2 <text:s/>e la folla gli faceva ressa intorno per ascoltare la parola di Dio, vide due barche ormeggiate alla sponda. I pescatori erano scesi e lavavano le reti. <text:s text:c="2"/></text:p>
      <text:p text:style-name="P217">5,3 <text:s/>Salì in una barca, che era di Simone, e lo pregò di scostarsi un poco da terra. Sedutosi, si mise ad ammaestrare le folle dalla barca. <text:s text:c="2"/></text:p>
      <text:soft-page-break/>
      <text:p text:style-name="P218">5,4 <text:s/>Quando ebbe finito di parlare, disse a Simone: "Prendi il largo e calate le reti per la pesca". <text:s text:c="2"/></text:p>
      <text:p text:style-name="P219">5,5 <text:s/>Simone rispose: "Maestro, abbiamo faticato tutta la notte e non abbiamo preso nulla; ma sulla tua parola getterò le reti". <text:s text:c="2"/></text:p>
      <text:p text:style-name="P220">5,6 <text:s/>E avendolo fatto, presero una quantità enorme di pesci e le reti si rompevano. <text:s text:c="2"/></text:p>
      <text:p text:style-name="P221">5,7 <text:s/>Allora fecero cenno ai compagni dell'altra barca, che venissero ad aiutarli. Essi vennero e riempirono tutte e due le barche al punto che quasi affondavano. <text:s text:c="2"/></text:p>
      <text:p text:style-name="P222">5,8 <text:s/>Al veder questo, Simon Pietro si gettò alle ginocchia di Gesù, dicendo: "Signore, allontanati da me che sono un peccatore". <text:s text:c="2"/></text:p>
      <text:p text:style-name="P223">5,9 <text:s/>Grande stupore infatti aveva preso lui e tutti quelli che erano insieme con lui per la pesca che avevano fatto; <text:s text:c="2"/></text:p>
      <text:p text:style-name="P224">5,10 <text:s/>così pure Giacomo e Giovanni, figli di Zebedèo, che erano soci di Simone. Gesù disse a Simone: <text:s/>"Non temere; d'ora in poi sarai pescatore di uomini". <text:s text:c="2"/></text:p>
      <text:p text:style-name="P225">5,11 <text:s/>Tirate le barche a terra, lasciarono tutto e lo seguirono. <text:s text:c="2"/></text:p>
      <text:p text:style-name="P226">5,12 <text:s/>Un giorno Gesù si trovava in una città e un uomo coperto di lebbra lo vide e gli si gettò ai piedi pregandolo: "Signore, se vuoi, puoi sanarmi". <text:s text:c="2"/></text:p>
      <text:p text:style-name="P227">5,13 <text:s/>Gesù stese la mano e lo toccò dicendo: "Lo voglio, sii risanato!". E subito la lebbra scomparve <text:s/>da lui. <text:s text:c="2"/></text:p>
      <text:p text:style-name="P228">5,14 <text:s/>Gli ingiunse di non dirlo a nessuno: "Va', mostrati al sacerdote e fa' l'offerta per la tua purificazione, come ha ordinato Mosè, perché serva di testimonianza per essi". <text:s text:c="2"/></text:p>
      <text:p text:style-name="P229">5,15 <text:s/>La sua fama si diffondeva ancor più; folle numerose venivano per ascoltarlo e farsi guarire dalle loro infermità. <text:s text:c="2"/></text:p>
      <text:p text:style-name="P230">5,16 <text:s/>Ma Gesù si ritirava in luoghi solitari a pregare. <text:s text:c="2"/></text:p>
      <text:p text:style-name="P231">5,17 <text:s/>Un giorno sedeva insegnando. Sedevano là anche farisei e dottori della legge, venuti da ogni villaggio della Galilea, della Giudea e da Gerusalemme. E la potenza del Signore gli faceva operare guarigioni. <text:s text:c="2"/></text:p>
      <text:p text:style-name="P232">5,18 <text:s/>Ed ecco alcuni uomini, portando sopra un letto un paralitico, cercavano di farlo passare e metterlo davanti a lui. <text:s text:c="2"/></text:p>
      <text:p text:style-name="P233">5,19 <text:s/>Non trovando da qual parte introdurlo a causa della folla, salirono sul tetto e lo calarono attraverso le tegole con il lettuccio davanti a Gesù, nel mezzo della stanza. <text:s text:c="2"/></text:p>
      <text:p text:style-name="P234">5,20 <text:s/>Veduta la loro fede, disse: "Uomo, i tuoi peccati ti sono rimessi". <text:s text:c="2"/></text:p>
      <text:p text:style-name="P235">5,21 <text:s/>Gli scribi e i farisei cominciarono a discutere dicendo: "Chi è costui che pronuncia bestemmie? Chi può rimettere i peccati, se non Dio soltanto?". <text:s text:c="2"/></text:p>
      <text:p text:style-name="P236">5,22 <text:s/>Ma Gesù, conosciuti i loro ragionamenti, rispose: "Che cosa andate ragionando nei vostri cuori? <text:s text:c="2"/></text:p>
      <text:p text:style-name="P237">5,23 <text:s/>Che cosa è più facile, dire: Ti sono rimessi i tuoi peccati, o dire: Alzati e cammina? <text:s text:c="2"/></text:p>
      <text:p text:style-name="P238">5,24 <text:s/>Ora, perché sappiate che il Figlio dell'uomo ha il potere sulla terra di rimettere i peccati: io ti dico - esclamò rivolto al paralitico - alzati, prendi il tuo lettuccio e va' a casa tua". <text:s text:c="2"/></text:p>
      <text:p text:style-name="P239">5,25 <text:s/>Subito egli si alzò davanti a loro, prese il lettuccio su cui era disteso e si avviò verso casa glorificando Dio. <text:s text:c="2"/></text:p>
      <text:p text:style-name="P240">5,26 <text:s/>Tutti rimasero stupiti e levavano lode a Dio; pieni di timore dicevano: "Oggi abbiamo visto cose prodigiose". <text:s text:c="2"/></text:p>
      <text:p text:style-name="P241">5,27 <text:s/>Dopo ciò egli uscì e vide un pubblicano di nome Levi seduto al banco delle imposte, e gli disse: <text:s/>"Seguimi!". <text:s text:c="2"/></text:p>
      <text:p text:style-name="P242">5,28 <text:s/>Egli, lasciando tutto, si alzò e lo seguì. <text:s text:c="2"/></text:p>
      <text:soft-page-break/>
      <text:p text:style-name="P243">5,29 <text:s/>Poi Levi gli preparò un grande banchetto nella sua casa. C'era una folla di pubblicani e d'altra gente seduta con loro a tavola. <text:s text:c="2"/></text:p>
      <text:p text:style-name="P244">5,30 <text:s/>I farisei e i loro scribi mormoravano e dicevano ai suoi discepoli: "Perché mangiate e bevete con i pubblicani e i peccatori?". <text:s text:c="2"/></text:p>
      <text:p text:style-name="P245">5,31 <text:s/>Gesù rispose: "Non sono i sani che hanno bisogno del medico, ma i malati; <text:s text:c="2"/></text:p>
      <text:p text:style-name="P246">5,32 <text:s/>io non sono venuto a chiamare i giusti, ma i peccatori a convertirsi". <text:s text:c="2"/></text:p>
      <text:p text:style-name="P247">5,33 <text:s/>Allora gli dissero: "I discepoli di Giovanni digiunano spesso e fanno orazioni; così pure i discepoli dei farisei; invece i tuoi mangiano e bevono!". <text:s text:c="2"/></text:p>
      <text:p text:style-name="P248">5,34 <text:s/>Gesù rispose: "Potete far digiunare gli invitati a nozze, mentre lo sposo è con loro? <text:s text:c="2"/></text:p>
      <text:p text:style-name="P249">5,35 <text:s/>Verranno però i giorni in cui lo sposo sarà strappato da loro; allora, in quei giorni, <text:s/>digiuneranno". <text:s text:c="2"/></text:p>
      <text:p text:style-name="P250">5,36 <text:s/>Diceva loro anche una parabola: "Nessuno strappa un pezzo da un vestito nuovo per attaccarlo a un vestito vecchio; altrimenti egli strappa il nuovo, e la toppa presa dal nuovo non si adatta al vecchio. <text:s text:c="2"/></text:p>
      <text:p text:style-name="P251">5,37 <text:s/>E nessuno mette vino nuovo in otri vecchi; altrimenti il vino nuovo spacca gli otri, si versa fuori e gli otri vanno perduti. <text:s text:c="2"/></text:p>
      <text:p text:style-name="P252">5,38 <text:s/>Il vino nuovo bisogna metterlo in otri nuovi. <text:s text:c="2"/></text:p>
      <text:p text:style-name="P253">5,39 <text:s/>E nessuno che beve il vino vecchio desidera il nuovo, perché dice: Il vecchio è buono!". <text:s text:c="2"/></text:p>
      <text:p text:style-name="P254">6,1 <text:s/>Un giorno di sabato passava attraverso campi di grano e i suoi discepoli coglievano e mangiavano le spighe, sfregandole con le mani. <text:s text:c="2"/></text:p>
      <text:p text:style-name="P255">6,2 <text:s/>Alcuni farisei dissero: "Perché fate ciò che non è permesso di sabato?". <text:s text:c="2"/></text:p>
      <text:p text:style-name="P256">6,3 <text:s/>Gesù rispose: "Allora non avete mai letto ciò che fece Davide, quando ebbe fame lui e i suoi compagni? <text:s text:c="2"/></text:p>
      <text:p text:style-name="P257">6,4 <text:s/>Come entrò nella casa di Dio, prese i pani dell'offerta, ne mangiò e ne diede ai suoi compagni, sebbene non fosse lecito mangiarli se non ai soli sacerdoti?". <text:s text:c="2"/></text:p>
      <text:p text:style-name="P258">6,5 <text:s/>E diceva loro: "Il Figlio dell'uomo è signore del sabato". <text:s text:c="2"/></text:p>
      <text:p text:style-name="P259">6,6 <text:s/>Un altro sabato egli entrò nella sinagoga e si mise a insegnare. Ora c'era là un uomo, che aveva la mano destra inaridita. <text:s text:c="2"/></text:p>
      <text:p text:style-name="P260">6,7 <text:s/>Gli scribi e i farisei lo osservavano per vedere se lo guariva di sabato, allo scopo di trovare <text:s/>un capo di accusa contro di lui. <text:s text:c="2"/></text:p>
      <text:p text:style-name="P261">6,8 <text:s/>Ma Gesù era a conoscenza dei loro pensieri e disse all'uomo che aveva la mano inaridita: "Alzati e mettiti nel mezzo!". L'uomo, alzatosi, si mise nel punto indicato. <text:s text:c="2"/></text:p>
      <text:p text:style-name="P262">6,9 <text:s/>Poi Gesù disse loro: "Domando a voi: È lecito in giorno di sabato fare del bene o fare del male, salvare una vita o perderla?". <text:s text:c="2"/></text:p>
      <text:p text:style-name="P263">6,10 <text:s/>E volgendo tutt'intorno lo sguardo su di loro, disse all'uomo: "Stendi la mano!". Egli lo fece e la mano guarì. <text:s text:c="2"/></text:p>
      <text:p text:style-name="P264">6,11 <text:s/>Ma essi furono pieni di rabbia e discutevano fra di loro su quello che avrebbero potuto fare a Gesù. <text:s text:c="2"/></text:p>
      <text:p text:style-name="P265">6,12 <text:s/>In quei giorni Gesù se ne andò sulla montagna a pregare e passò la notte in orazione. <text:s text:c="2"/></text:p>
      <text:p text:style-name="P266">6,13 <text:s/>Quando fu giorno, chiamò a sé i suoi discepoli e ne scelse dodici, ai quali diede il nome di apostoli: <text:s text:c="2"/></text:p>
      <text:p text:style-name="P267">6,14 <text:s/>Simone, che chiamò anche Pietro, Andrea suo fratello, Giacomo, Giovanni, Filippo, Bartolomeo, <text:s text:c="2"/></text:p>
      <text:p text:style-name="P268">6,15 <text:s/>Matteo, Tommaso, Giacomo d'Alfeo, Simone soprannominato Zelota, <text:s text:c="2"/></text:p>
      <text:soft-page-break/>
      <text:p text:style-name="P269">6,16 <text:s/>Giuda di Giacomo e Giuda Iscariota, che fu il traditore. <text:s text:c="2"/></text:p>
      <text:p text:style-name="P270">6,17 <text:s/>Disceso con loro, si fermò in un luogo pianeggiante. C'era gran folla di suoi discepoli e gran moltitudine di gente da tutta la Giudea, da Gerusalemme e dal litorale di Tiro e di Sidone, <text:s text:c="2"/></text:p>
      <text:p text:style-name="P271">6,18 <text:s/>che erano venuti per ascoltarlo ed esser guariti dalle loro malattie; anche quelli che erano tormentati da spiriti immondi, venivano guariti. <text:s text:c="2"/></text:p>
      <text:p text:style-name="P272">6,19 <text:s/>Tutta la folla cercava di toccarlo, perché da lui usciva una forza che sanava tutti. <text:s text:c="2"/></text:p>
      <text:p text:style-name="P273">6,20 <text:s/>Alzati gli occhi verso i suoi discepoli, Gesù diceva: "Beati voi poveri, perché vostro è il regno di Dio. <text:s text:c="2"/></text:p>
      <text:p text:style-name="P274">6,21 <text:s/>Beati voi che ora avete fame, perché sarete saziati. Beati voi che ora piangete, perché riderete. <text:s text:c="2"/></text:p>
      <text:p text:style-name="P275">6,22 <text:s/>Beati voi quando gli uomini vi odieranno e quando vi metteranno al bando e v'insulteranno e respingeranno il vostro nome come scellerato, a causa del Figlio dell'uomo. <text:s text:c="2"/></text:p>
      <text:p text:style-name="P276">6,23 <text:s/>Rallegratevi in quel giorno ed esultate, perché, ecco, la vostra ricompensa è grande nei cieli. Allo stesso modo infatti facevano i loro padri con i profeti. <text:s text:c="2"/></text:p>
      <text:p text:style-name="P277">6,24 <text:s/>Ma guai a voi, ricchi, perché avete già la vostra consolazione. <text:s text:c="2"/></text:p>
      <text:p text:style-name="P278">6,25 <text:s/>Guai a voi che ora siete sazi, perché avrete fame. Guai a voi che ora ridete, perché sarete afflitti e piangerete. <text:s text:c="2"/></text:p>
      <text:p text:style-name="P279">6,26 <text:s/>Guai quando tutti gli uomini diranno bene di voi. Allo stesso modo infatti facevano i loro padri con i falsi profeti. <text:s text:c="2"/></text:p>
      <text:p text:style-name="P280">6,27 <text:s/>Ma a voi che ascoltate, io dico: Amate i vostri nemici, fate del bene a coloro che vi odiano, <text:s text:c="2"/></text:p>
      <text:p text:style-name="P281">6,28 <text:s/>benedite coloro che vi maledicono, pregate per coloro che vi maltrattano. <text:s text:c="2"/></text:p>
      <text:p text:style-name="P282">6,29 <text:s/>A chi ti percuote sulla guancia, porgi anche l'altra; a chi ti leva il mantello, non rifiutare la tunica. <text:s text:c="2"/></text:p>
      <text:p text:style-name="P283">6,30 <text:s/>Da' a chiunque ti chiede; e a chi prende del tuo, non richiederlo. <text:s text:c="2"/></text:p>
      <text:p text:style-name="P284">6,31 <text:s/>Ciò che volete gli uomini facciano a voi, anche voi fatelo a loro. <text:s text:c="2"/></text:p>
      <text:p text:style-name="P285">6,32 <text:s/>Se amate quelli che vi amano, che merito ne avrete? Anche i peccatori fanno lo stesso. <text:s text:c="2"/></text:p>
      <text:p text:style-name="P286">6,33 <text:s/>E se fate del bene a coloro che vi fanno del bene, che merito ne avrete? Anche i peccatori fanno lo stesso. <text:s text:c="2"/></text:p>
      <text:p text:style-name="P287">6,34 <text:s/>E se prestate a coloro da cui sperate ricevere, che merito ne avrete? Anche i peccatori concedono prestiti ai peccatori per riceverne altrettanto. <text:s text:c="2"/></text:p>
      <text:p text:style-name="P288">6,35 <text:s/>Amate invece i vostri nemici, fate del bene e prestate senza sperarne nulla, e il vostro premio sarà grande e sarete figli dell'Altissimo; perché egli è benevolo verso gl'ingrati e i malvagi. <text:s text:c="2"/></text:p>
      <text:p text:style-name="P289">6,36 <text:s/>Siate misericordiosi, come è misericordioso il Padre vostro. <text:s text:c="2"/></text:p>
      <text:p text:style-name="P290">6,37 <text:s/>Non giudicate e non sarete giudicati; non condannate e non sarete condannati; perdonate e vi sarà perdonato; <text:s text:c="2"/></text:p>
      <text:p text:style-name="P291">6,38 <text:s/>date e vi sarà dato; una buona misura, pigiata, scossa e traboccante vi sarà versata nel grembo, perché con la misura con cui misurate, sarà misurato a voi in cambio". <text:s text:c="2"/></text:p>
      <text:p text:style-name="P292">6,39 <text:s/>Disse loro anche una parabola: "Può forse un cieco guidare un altro cieco? Non cadranno tutt'e due in una buca? <text:s text:c="2"/></text:p>
      <text:p text:style-name="P293">6,40 <text:s/>Il discepolo non è da più del maestro; ma ognuno ben preparato sarà come il suo maestro. <text:s text:c="2"/></text:p>
      <text:soft-page-break/>
      <text:p text:style-name="P294">6,41 <text:s/>Perché guardi la pagliuzza che è nell'occhio del tuo fratello, e non t'accorgi della trave che è nel tuo? <text:s text:c="2"/></text:p>
      <text:p text:style-name="P295">6,42 <text:s/>Come puoi dire al tuo fratello: Permetti che tolga la pagliuzza che è nel tuo occhio, mentre tu non vedi la trave che è nel tuo? Ipocrita, togli prima la trave dal tuo occhio e allora potrai vederci bene nel togliere la pagliuzza dall'occhio del tuo fratello. <text:s text:c="2"/></text:p>
      <text:p text:style-name="P296">6,43 <text:s/>Non c'è albero buono che faccia frutti cattivi, né albero cattivo che faccia frutti buoni. <text:s text:c="2"/></text:p>
      <text:p text:style-name="P297">6,44 <text:s/>Ogni albero infatti si riconosce dal suo frutto: non si raccolgono fichi dalle spine, né si vendemmia uva da un rovo. <text:s text:c="2"/></text:p>
      <text:p text:style-name="P298">6,45 <text:s/>L'uomo buono trae fuori il bene dal buon tesoro del suo cuore; l'uomo cattivo dal suo cattivo tesoro trae fuori il male, perché la bocca parla dalla pienezza del cuore. <text:s text:c="2"/></text:p>
      <text:p text:style-name="P299">6,46 <text:s/>Perché mi chiamate: Signore, Signore, e poi non fate ciò che dico? <text:s text:c="2"/></text:p>
      <text:p text:style-name="P300">6,47 <text:s/>Chi viene a me e ascolta le mie parole e le mette in pratica, vi mostrerò a chi è simile: <text:s text:c="2"/></text:p>
      <text:p text:style-name="P301">6,48 <text:s/>è simile a un uomo che, costruendo una casa, ha scavato molto profondo e ha posto le fondamenta sopra la roccia. Venuta la piena, il fiume irruppe contro quella casa, ma non riuscì a smuoverla perché era costruita bene. <text:s text:c="2"/></text:p>
      <text:p text:style-name="P302">6,49 <text:s/>Chi invece ascolta e non mette in pratica, è simile a un uomo che ha costruito una casa sulla terra, senza fondamenta. Il fiume la investì e subito crollò; e la rovina di quella casa fu grande". <text:s text:c="2"/></text:p>
      <text:p text:style-name="P303">7,1 <text:s/>Quando ebbe terminato di rivolgere tutte queste parole al popolo che stava in ascolto, entrò in Cafarnao. <text:s text:c="2"/></text:p>
      <text:p text:style-name="P304">7,2 <text:s/>Il servo di un centurione era ammalato e stava per morire. Il centurione l'aveva molto caro. <text:s text:c="2"/></text:p>
      <text:p text:style-name="P305">7,3 <text:s/>Perciò, avendo udito parlare di Gesù, gli mandò alcuni anziani dei Giudei a pregarlo di venire e di salvare il suo servo. <text:s text:c="2"/></text:p>
      <text:p text:style-name="P306">7,4 <text:s/>Costoro giunti da Gesù lo pregavano con insistenza: "Egli merita che tu gli faccia questa grazia, dicevano, <text:s text:c="2"/></text:p>
      <text:p text:style-name="P307">7,5 <text:s/>perché ama il nostro popolo, ed è stato lui a costruirci la sinagoga". <text:s text:c="2"/></text:p>
      <text:p text:style-name="P308">7,6 <text:s/>Gesù si incamminò con loro. Non era ormai molto distante dalla casa quando il centurione mandò alcuni amici a dirgli: "Signore, non stare a disturbarti, io non son degno che tu entri sotto il mio tetto; <text:s text:c="2"/></text:p>
      <text:p text:style-name="P309">7,7 <text:s/>per questo non mi sono neanche ritenuto degno di venire da te, ma comanda con una parola e il mio servo sarà guarito. <text:s text:c="2"/></text:p>
      <text:p text:style-name="P310">7,8 <text:s/>Anch'io infatti sono uomo sottoposto a un'autorità, e ho sotto di me dei soldati; e dico all'uno: <text:s/>Va' ed egli va, e a un altro: Vieni, ed egli viene, e al mio servo: Fa' questo, ed egli lo fa". <text:s text:c="2"/></text:p>
      <text:p text:style-name="P311">7,9 <text:s/>All'udire questo Gesù restò ammirato e rivolgendosi alla folla che lo seguiva disse: "Io vi dico che neanche in Israele ho trovato una fede così grande!". <text:s text:c="2"/></text:p>
      <text:p text:style-name="P312">7,10 <text:s/>E gli inviati, quando tornarono a casa, trovarono il servo guarito. <text:s text:c="2"/></text:p>
      <text:p text:style-name="P313">7,11 <text:s/>In seguito si recò in una città chiamata Nain e facevano la strada con lui i discepoli e grande folla. <text:s text:c="2"/></text:p>
      <text:p text:style-name="P314">7,12 <text:s/>Quando fu vicino alla porta della città, ecco che veniva portato al sepolcro un morto, figlio <text:s/>unico di madre vedova; e molta gente della città era con lei. <text:s text:c="2"/></text:p>
      <text:p text:style-name="P315">7,13 <text:s/>Vedendola, il Signore ne ebbe compassione e le disse: "Non piangere!". <text:s text:c="2"/></text:p>
      <text:p text:style-name="P316">7,14 <text:s/>E accostatosi toccò la bara, mentre i portatori si fermarono. Poi disse: "Giovinetto, dico a te, <text:s/>alzati!". <text:s text:c="2"/></text:p>
      <text:soft-page-break/>
      <text:p text:style-name="P317">7,15 <text:s/>Il morto si levò a sedere e incominciò a parlare. Ed egli lo diede alla madre. <text:s text:c="2"/></text:p>
      <text:p text:style-name="P318">7,16 <text:s/>Tutti furono presi da timore e glorificavano Dio dicendo: "Un grande profeta è sorto tra noi e <text:s/>Dio ha visit</text:p>
      <text:p text:style-name="P319">ato il suo popolo". <text:s text:c="2"/></text:p>
      <text:p text:style-name="P320">7,17 <text:s/>La fama di questi fatti si diffuse in tutta la Giudea e per tutta la regione. <text:s text:c="2"/></text:p>
      <text:p text:style-name="P321">7,18 <text:s/>Anche Giovanni fu informato dai suoi discepoli di tutti questi avvenimenti. Giovanni chiamò due <text:s/>di essi <text:s text:c="2"/></text:p>
      <text:p text:style-name="P322">7,19 <text:s/>e li mandò a dire al Signore: "Sei tu colui che viene, o dobbiamo aspettare un altro?". <text:s text:c="2"/></text:p>
      <text:p text:style-name="P323">7,20 <text:s/>Venuti da lui, quegli uomini dissero: "Giovanni il Battista ci ha mandati da te per domandarti: <text:s/>Sei tu colui che viene o dobbiamo aspettare un altro?". <text:s text:c="2"/></text:p>
      <text:p text:style-name="P324">7,21 <text:s/>In quello stesso momento Gesù guarì molti da malattie, da infermità, da spiriti cattivi e donò la <text:s/>vista a molti ciechi. <text:s text:c="2"/></text:p>
      <text:p text:style-name="P325">7,22 <text:s/>Poi diede loro questa risposta: "Andate e riferite a Giovanni ciò che avete visto e udito: i <text:s/>ciechi riacquistano la vista, gli zoppi camminano, i lebbrosi vengono sanati, i sordi odono, i <text:s/>morti risuscitano, ai poveri è annunziata la buona novella. <text:s text:c="2"/></text:p>
      <text:p text:style-name="P326">7,23 <text:s/>E beato è chiunque non sarà scandalizzato di me!". <text:s text:c="2"/></text:p>
      <text:p text:style-name="P327">7,24 <text:s/>Quando gli inviati di Giovanni furono partiti, Gesù cominciò a dire alla folla riguardo a <text:s/>Giovanni: "Che cosa siete andati a vedere nel deserto? Una canna agitata dal vento? <text:s text:c="2"/></text:p>
      <text:p text:style-name="P328">7,25 <text:s/>E allora, che cosa siete andati a vedere? Un uomo avvolto in morbide vesti? Coloro che portano <text:s/>vesti sontuose e vivono nella lussuria stanno nei palazzi dei re. <text:s text:c="2"/></text:p>
      <text:p text:style-name="P329">7,26 <text:s/>Allora, che cosa siete andati a vedere? Un profeta? Sì, vi dico, e più che un profeta. <text:s text:c="2"/></text:p>
      <text:p text:style-name="P330">7,27 <text:s/>Egli è colui del quale sta scritto: Ecco io mando davanti a te il mio messaggero, egli preparerà <text:s/>la via davanti a te. <text:s text:c="2"/></text:p>
      <text:p text:style-name="P331">7,28 <text:s/>Io vi dico, tra i nati di donna non c'è nessuno più grande di Giovanni, e il più piccolo nel <text:s/>regno di Dio è più grande di lui. <text:s text:c="2"/></text:p>
      <text:p text:style-name="P332">7,29 <text:s/>Tutto il popolo che lo ha ascoltato, e anche i pubblicani, hanno riconosciuto la giustizia di Dio <text:s/>ricevendo il battesimo di Giovanni. <text:s text:c="2"/></text:p>
      <text:p text:style-name="P333">7,30 <text:s/>Ma i farisei e i dottori della legge non facendosi battezzare da lui hanno reso vano per loro il <text:s/>disegno di Dio. <text:s text:c="2"/></text:p>
      <text:p text:style-name="P334">7,31 <text:s/>A chi dunque paragonerò gli uomini di questa generazione, a chi sono simili? <text:s text:c="2"/></text:p>
      <text:p text:style-name="P335">7,32 <text:s/>Sono simili a quei bambini che stando in piazza gridano gli uni agli altri: Vi abbiamo suonato il <text:s/>flauto e non avete ballato; vi abbiamo cantato un lamento e non avete pianto! <text:s text:c="2"/></text:p>
      <text:p text:style-name="P336">7,33 <text:s/>È venuto infatti Giovanni il Battista che non mangia pane e non beve vino, e voi dite: Ha un <text:s/>demonio. <text:s text:c="2"/></text:p>
      <text:p text:style-name="P337">7,34 <text:s/>È venuto il Figlio dell'uomo che mangia e beve, e voi dite: Ecco un mangione e un beone, amico <text:s/>dei pubblicani e dei peccatori. <text:s text:c="2"/></text:p>
      <text:p text:style-name="P338">7,35 <text:s/>Ma alla sapienza è stata resa giustizia da tutti i suoi figli". <text:s text:c="2"/></text:p>
      <text:p text:style-name="P339">7,36 <text:s/>Uno dei farisei lo invitò a mangiare da lui. Egli entrò nella casa del fariseo e si mise a <text:s/>tavola. <text:s text:c="2"/></text:p>
      <text:p text:style-name="P340">7,37 <text:s/>Ed ecco una donna, una peccatrice di quella città, saputo che si trovava nella casa del fariseo, <text:s/>venne con un vasetto di olio profumato; <text:s text:c="2"/></text:p>
      <text:p text:style-name="P341">7,38 <text:s/>e stando dietro, presso i suoi piedi, piangendo cominciò a bagnarli di lacrime, poi li asciugava <text:s/>con i suoi capelli, li baciava e li cospargeva di olio profumato. <text:s text:c="2"/></text:p>
      <text:soft-page-break/>
      <text:p text:style-name="P342">7,39 <text:s/>A quella vista il fariseo che l'aveva invitato pensò tra sé. "Se costui fosse un profeta, <text:s/>saprebbe chi e che specie di donna è colei che lo tocca: è una peccatrice". <text:s text:c="2"/></text:p>
      <text:p text:style-name="P343">7,40 <text:s/>Gesù allora gli disse: "Simone, ho una cosa da dirti". Ed egli: "Maestro, di' pure". <text:s text:c="2"/></text:p>
      <text:p text:style-name="P344">7,41 <text:s/>"Un creditore aveva due debitori: l'uno gli doveva cinquecento denari, l'altro cinquanta. <text:s text:c="2"/></text:p>
      <text:p text:style-name="P345">7,42 <text:s/>Non avendo essi da restituire, condonò il debito a tutti e due. Chi dunque di loro lo amerà di <text:s/>più?". <text:s text:c="2"/></text:p>
      <text:p text:style-name="P346">7,43 <text:s/>Simone rispose: "Suppongo quello a cui ha condonato di più". Gli disse Gesù: "Hai giudicato <text:s/>bene". <text:s text:c="2"/></text:p>
      <text:p text:style-name="P347">7,44 <text:s/>E volgendosi verso la donna, disse a Simone: "Vedi questa donna? Sono entrato nella tua casa e tu <text:s/>non m'hai dato l'acqua per i piedi; lei invece mi ha bagnato i piedi con le lacrime e li ha <text:s/>asciugati con i suoi capelli. <text:s text:c="2"/></text:p>
      <text:p text:style-name="P348">7,45 <text:s/>Tu non mi hai dato un bacio, lei invece da quando sono entrato non ha cessato di baciarmi i <text:s/>piedi. <text:s text:c="2"/></text:p>
      <text:p text:style-name="P349">7,46 <text:s/>Tu non mi hai cosparso il capo di olio profumato, ma lei mi ha cosparso di profumo i piedi. <text:s text:c="2"/></text:p>
      <text:p text:style-name="P350">7,47 <text:s/>Per questo ti dico: le sono perdonati i suoi molti peccati, poiché ha molto amato. Invece quello <text:s/>a cui si perdona poco, ama poco". <text:s text:c="2"/></text:p>
      <text:p text:style-name="P351">7,48 <text:s/>Poi disse a lei: "Ti sono perdonati i tuoi peccati". <text:s text:c="2"/></text:p>
      <text:p text:style-name="P352">7,49 <text:s/>Allora i commensali cominciarono a dire tra sé: "Chi è quest'uomo che perdona anche i peccati?". <text:s text:c="2"/></text:p>
      <text:p text:style-name="P353">7,50 <text:s/>Ma egli disse alla donna: "La tua fede ti ha salvata; va' in pace!". <text:s text:c="2"/></text:p>
      <text:p text:style-name="P354">8,1 <text:s/>In seguito egli se ne andava per le città e i villaggi, predicando e annunziando la buona novella <text:s/>del regno di Dio. <text:s text:c="2"/></text:p>
      <text:p text:style-name="P355">8,2 <text:s/>C'erano con lui i Dodici e alcune donne che erano state guarite da spiriti cattivi e da <text:s/>infermità: Maria di Màgdala, dalla quale erano usciti sette demòni, <text:s text:c="2"/></text:p>
      <text:p text:style-name="P356">8,3 <text:s/>Giovanna, moglie di Cusa, amministratore di Erode, Susanna e molte altre, che li assistevano con <text:s/>i loro beni. <text:s text:c="2"/></text:p>
      <text:p text:style-name="P357">8,4 <text:s/>Poiché una gran folla si radunava e accorreva a lui gente da ogni città, disse con una parabola: <text:s text:c="2"/></text:p>
      <text:p text:style-name="P358">8,5 <text:s/>"Il seminatore uscì a seminare la sua semente. Mentre seminava, parte cadde lungo la strada e fu <text:s/>calpestata, e gli uccelli del cielo la divorarono. <text:s text:c="2"/></text:p>
      <text:p text:style-name="P359">8,6 <text:s/>Un'altra parte cadde sulla pietra e appena germogliata inaridì per mancanza di umidità. <text:s text:c="2"/></text:p>
      <text:p text:style-name="P360">8,7 <text:s/>Un'altra cadde in mezzo alle spine e le spine, cresciute insieme con essa, la soffocarono. <text:s text:c="2"/></text:p>
      <text:p text:style-name="P361">8,8 <text:s/>Un'altra cadde sulla terra buona, germogliò e fruttò cento volte tanto". Detto questo, esclamò: <text:s/>"Chi ha orecchi per intendere, intenda!". <text:s text:c="2"/></text:p>
      <text:p text:style-name="P362">8,9 <text:s/>I suoi discepoli lo interrogarono sul significato della parabola. <text:s text:c="2"/></text:p>
      <text:p text:style-name="P363">8,10 <text:s/>Ed egli disse: "A voi è dato conoscere i misteri del regno di Dio, ma agli altri solo in <text:s/>parabole, perché vedendo non vedano e udendo non intendano. <text:s text:c="2"/></text:p>
      <text:p text:style-name="P364">8,11 <text:s/>Il significato della parabola è questo: Il seme è la parola di Dio. <text:s text:c="2"/></text:p>
      <text:p text:style-name="P365">8,12 <text:s/>I semi caduti lungo la strada sono coloro che l'hanno ascoltata, ma poi viene il diavolo e porta <text:s/>via la parola dai loro cuori, perché non credano e così siano salvati. <text:s text:c="2"/></text:p>
      <text:p text:style-name="P366">8,13 <text:s/>Quelli sulla pietra sono coloro che, quando ascoltano, accolgono con gioia la parola, ma non <text:s/>hanno radice; credono per un certo tempo, ma nell'ora della tentazione vengono meno. <text:s text:c="2"/></text:p>
      <text:soft-page-break/>
      <text:p text:style-name="P367">8,14 <text:s/>Il seme caduto in mezzo alle spine sono coloro che, dopo aver ascoltato, strada facendo si <text:s/>lasciano sopraffare dalle preoccupazioni, dalla ricchezza e dai piaceri della vita e non giungono <text:s/>a maturazione. <text:s text:c="2"/></text:p>
      <text:p text:style-name="P368">8,15 <text:s/>Il seme caduto sulla terra buona sono coloro che, dopo aver ascoltato la parola con cuore buono e <text:s/>perfetto, la custodiscono e producono frutto con la loro perseveranza. <text:s text:c="2"/></text:p>
      <text:p text:style-name="P369">8,16 <text:s/>Nessuno accende una lampada e la copre con un vaso o la pone sotto un letto; la pone invece su un <text:s/>lampadario, perché chi entra veda la luce. <text:s text:c="2"/></text:p>
      <text:p text:style-name="P370">8,17 <text:s/>Non c'è nulla di nascosto che non debba essere manifestato, nulla di segreto che non debba essere <text:s/>conosciuto e venire in piena luce. <text:s text:c="2"/></text:p>
      <text:p text:style-name="P371">8,18 <text:s/>Fate attenzione dunque a come ascoltate; perché a chi ha sarà dato, ma a chi non ha sarà tolto <text:s/>anche ciò che crede di avere". <text:s text:c="2"/></text:p>
      <text:p text:style-name="P372">8,19 <text:s/>Un giorno andarono a trovarlo la madre e i fratelli, ma non potevano avvicinarlo a causa della <text:s/>folla. <text:s text:c="2"/></text:p>
      <text:p text:style-name="P373">8,20 <text:s/>Gli fu annunziato: "Tua madre e i tuoi fratelli sono qui fuori e desiderano vederti". <text:s text:c="2"/></text:p>
      <text:p text:style-name="P374">8,21 <text:s/>Ma egli rispose: "Mia madre e miei fratelli sono coloro che ascoltano la parola di Dio e la <text:s/>mettono in pratica". <text:s text:c="2"/></text:p>
      <text:p text:style-name="P375">8,22 <text:s/>Un giorno salì su una barca con i suoi discepoli e disse: "Passiamo all'altra riva del lago". <text:s/>Presero il largo. <text:s text:c="2"/></text:p>
      <text:p text:style-name="P376">8,23 <text:s/>Ora, mentre navigavano, egli si addormentò. Un turbine di vento si abbatté sul lago, imbarcavano <text:s/>acqua ed erano in pericolo. <text:s text:c="2"/></text:p>
      <text:p text:style-name="P377">8,24 <text:s/>Accostatisi a lui, lo svegliarono dicendo: "Maestro, maestro, siamo perduti!". E lui, destatosi, <text:s/>sgridò il vento e i flutti minacciosi; essi cessarono e si fece bonaccia. <text:s text:c="2"/></text:p>
      <text:p text:style-name="P378">8,25 <text:s/>Allora disse loro: "Dov'è la vostra fede?". Essi intimoriti e meravigliati si dicevano l'un <text:s/>l'altro: "Chi è dunque costui che dà ordini ai venti e all'acqua e gli obbediscono?". <text:s text:c="2"/></text:p>
      <text:p text:style-name="P379">8,26 <text:s/>Approdarono nella regione dei Gerasèni, che sta di fronte alla Galilea. <text:s text:c="2"/></text:p>
      <text:p text:style-name="P380">8,27 <text:s/>Era appena sceso a terra, quando gli venne incontro un uomo della città posseduto dai demòni. Da <text:s/>molto tempo non portava vestiti, né abitava in casa, ma nei sepolcri. <text:s text:c="2"/></text:p>
      <text:p text:style-name="P381">8,28 <text:s/>Alla vista di Gesù gli si gettò ai piedi urlando e disse a gran voce: "Che vuoi da me, Gesù, <text:s/>Figlio del Dio Altissimo? Ti prego, non tormentarmi!". <text:s text:c="2"/></text:p>
      <text:p text:style-name="P382">8,29 <text:s/>Gesù infatti stava ordinando allo spirito immondo di uscire da quell'uomo. Molte volte infatti <text:s/>s'era impossessato di lui; allora lo legavano con catene e lo custodivano in ceppi, ma egli <text:s/>spezzava i legami e veniva spinto dal demonio in luoghi deserti. <text:s text:c="2"/></text:p>
      <text:p text:style-name="P383">8,30 <text:s/>Gesù gli domandò: "Qual è il tuo nome?". Rispose: "Legione", perché molti demòni erano entrati in <text:s/>lui. <text:s text:c="2"/></text:p>
      <text:p text:style-name="P384">8,31 <text:s/>E lo supplicavano che non ordinasse loro di andarsene nell'abisso. <text:s text:c="2"/></text:p>
      <text:p text:style-name="P385">8,32 <text:s/>Vi era là un numeroso branco di porci che pascolavano sul monte. Lo pregarono che concedesse loro <text:s/>di entrare nei porci; ed egli lo permise. <text:s text:c="2"/></text:p>
      <text:p text:style-name="P386">8,33 <text:s/>I demòni uscirono dall'uomo ed entrarono nei porci e quel branco corse a gettarsi a precipizio <text:s/>dalla rupe nel lago e annegò. <text:s text:c="2"/></text:p>
      <text:p text:style-name="P387">8,34 <text:s/>Quando videro ciò che era accaduto, i mandriani fuggirono e portarono la notizia nella città e <text:s/>nei villaggi. <text:s text:c="2"/></text:p>
      <text:p text:style-name="P388">8,35 <text:s/>La gente uscì per vedere l'accaduto, arrivarono da Gesù e trovarono l'uomo dal quale erano usciti <text:s/>i demòni vestito e sano di mente, che sedeva ai piedi di Gesù; e furono presi da spavento. <text:s text:c="2"/></text:p>
      <text:p text:style-name="P389">8,36 <text:s/>Quelli che erano stati spettatori riferirono come l'indemoniato era stato guarito. <text:s text:c="2"/></text:p>
      <text:soft-page-break/>
      <text:p text:style-name="P390">8,37 <text:s/>Allora tutta la popolazione del territorio dei Gerasèni gli chiese che si allontanasse da loro, <text:s/>perché avevano molta paura. Gesù, salito su una barca, tornò indietro. <text:s text:c="2"/></text:p>
      <text:p text:style-name="P391">8,38 <text:s/>L'uomo dal quale erano usciti i demòni gli chiese di restare con lui, ma egli lo congedò dicendo: <text:s text:c="2"/></text:p>
      <text:p text:style-name="P392">8,39 <text:s/>"Torna a casa tua e racconta quello che Dio ti ha fatto". L'uomo se ne andò, proclamando per <text:s/>tutta la città quello che Gesù gli aveva fatto. <text:s text:c="2"/></text:p>
      <text:p text:style-name="P393">8,40 <text:s/>Al suo ritorno, Gesù fu accolto dalla folla, poiché tutti erano in attesa di lui. <text:s text:c="2"/></text:p>
      <text:p text:style-name="P394">8,41 <text:s/>Ed ecco venne un uomo di nome Giàiro, che era capo della sinagoga: gettatosi ai piedi di Gesù, lo <text:s/>pregava di recarsi a casa sua, <text:s text:c="2"/></text:p>
      <text:p text:style-name="P395">8,42 <text:s/>perché aveva un'unica figlia, di circa dodici anni, che stava per morire. Durante il cammino, le <text:s/>folle gli si accalcavano attorno. <text:s text:c="2"/></text:p>
      <text:p text:style-name="P396">8,43 <text:s/>Una donna che soffriva di emorragia da dodici anni, e che nessuno era riuscito a guarire, <text:s text:c="2"/></text:p>
      <text:p text:style-name="P397">8,44 <text:s/>gli si avvicinò alle spalle e gli toccò il lembo del mantello e subito il flusso di sangue si <text:s/>arrestò. <text:s text:c="2"/></text:p>
      <text:p text:style-name="P398">8,45 <text:s/>Gesù disse: "Chi mi ha toccato?". Mentre tutti negavano, Pietro disse: "Maestro, la folla ti <text:s/>stringe da ogni parte e ti schiaccia". <text:s text:c="2"/></text:p>
      <text:p text:style-name="P399">8,46 <text:s/>Ma Gesù disse: "Qualcuno mi ha toccato. Ho sentito che una forza è uscita da me". <text:s text:c="2"/></text:p>
      <text:p text:style-name="P400">8,47 <text:s/>Allora la donna, vedendo che non poteva rimanere nascosta, si fece avanti tremando e, gettatasi <text:s/>ai suoi piedi, dichiarò davanti a tutto il popolo il motivo per cui l'aveva toccato, e come era <text:s/>stata subito guarita. <text:s text:c="2"/></text:p>
      <text:p text:style-name="P401">8,48 <text:s/>Egli le disse: "Figlia, la tua fede ti ha salvata, va' in pace!". <text:s text:c="2"/></text:p>
      <text:p text:style-name="P402">8,49 <text:s/>Stava ancora parlando quando venne uno della casa del capo della sinagoga a dirgli: "Tua figlia è <text:s/>morta, non disturbare più il maestro". <text:s text:c="2"/></text:p>
      <text:p text:style-name="P403">8,50 <text:s/>Ma Gesù che aveva udito rispose: "Non temere, soltanto abbi fede e sarà salvata". <text:s text:c="2"/></text:p>
      <text:p text:style-name="P404">8,51 <text:s/>Giunto alla casa, non lasciò entrare nessuno con sé, all'infuori di Pietro, Giovanni e Giacomo e <text:s/>il padre e la madre della fanciulla. <text:s text:c="2"/></text:p>
      <text:p text:style-name="P405">8,52 <text:s/>Tutti piangevano e facevano il lamento su di lei. Gesù disse: "Non piangete, perché non è morta, <text:s/>ma dorme". <text:s text:c="2"/></text:p>
      <text:p text:style-name="P406">8,53 <text:s/>Essi lo deridevano, sapendo che era morta, <text:s text:c="2"/></text:p>
      <text:p text:style-name="P407">8,54 <text:s/>ma egli, prendendole la mano, disse ad alta voce: "Fanciulla, alzati!". <text:s text:c="2"/></text:p>
      <text:p text:style-name="P408">8,55 <text:s/>Il suo spirito ritornò in lei ed ella si alzò all'istante. Egli ordinò di darle da mangiare. <text:s text:c="2"/></text:p>
      <text:p text:style-name="P409">8,56 <text:s/>I genitori ne furono sbalorditi, ma egli raccomandò loro di non raccontare a nessuno ciò che era <text:s/>accaduto. <text:s text:c="2"/></text:p>
      <text:p text:style-name="P410">9,1 <text:s/>Egli allora chiamò a sé i Dodici e diede loro potere e autorità su tutti i demòni e di curare le <text:s/>malattie. <text:s text:c="2"/></text:p>
      <text:p text:style-name="P411">9,2 <text:s/>E li mandò ad annunziare il regno di Dio e a guarire gli infermi. <text:s text:c="2"/></text:p>
      <text:p text:style-name="P412">9,3 <text:s/>Disse loro: "Non prendete nulla per il viaggio, né bastone, né bisaccia, né pane, né denaro, né <text:s/>due tuniche per ciascuno. <text:s text:c="2"/></text:p>
      <text:p text:style-name="P413">9,4 <text:s/>In qualunque casa entriate, là rimanete e di là poi riprendete il cammino. <text:s text:c="2"/></text:p>
      <text:p text:style-name="P414">9,5 <text:s/>Quanto a coloro che non vi accolgono, nell'uscire dalla loro città, scuotete la polvere dai <text:s/>vostri piedi, a testimonianza contro di essi". <text:s text:c="2"/></text:p>
      <text:p text:style-name="P415">9,6 <text:s/>Allora essi partirono e passavano di villaggio in villaggio, annunziando dovunque la buona <text:s/>novella e operando guarigioni. <text:s text:c="2"/></text:p>
      <text:soft-page-break/>
      <text:p text:style-name="P416">9,7 <text:s/>Intanto il tetrarca Erode sentì parlare di tutti questi avvenimenti e non sapeva che cosa <text:s/>pensare, perché alcuni dicevano: "Giovanni è risuscitato dai morti", <text:s text:c="2"/></text:p>
      <text:p text:style-name="P417">9,8 <text:s/>altri: "È apparso Elia", e altri ancora: "È risorto uno degli antichi profeti". <text:s text:c="2"/></text:p>
      <text:p text:style-name="P418">9,9 <text:s/>Ma Erode diceva: "Giovanni l'ho fatto decapitare io; chi è dunque costui, del quale sento dire <text:s/>tali cose?". E cercava di vederlo. <text:s text:c="2"/></text:p>
      <text:p text:style-name="P419">9,10 <text:s/>Al loro ritorno, gli apostoli raccontarono a Gesù tutto quello che avevano fatto. Allora li prese <text:s/>con sé e si ritirò verso una città chiamata Betsàida. <text:s text:c="2"/></text:p>
      <text:p text:style-name="P420">9,11 <text:s/>Ma le folle lo seppero e lo seguirono. Egli le accolse e prese a parlar loro del regno di Dio e a <text:s/>guarire quanti avevan bisogno di cure. <text:s text:c="2"/></text:p>
      <text:p text:style-name="P421">9,12 <text:s/>Il giorno cominciava a declinare e i Dodici gli si avvicinarono dicendo: "Congeda la folla, <text:s/>perché vada nei villaggi e nelle campagne dintorno per alloggiare e trovar cibo, poiché qui siamo <text:s/>in una zona deserta". <text:s text:c="2"/></text:p>
      <text:p text:style-name="P422">9,13 <text:s/>Gesù disse loro: "Dategli voi stessi da mangiare". Ma essi risposero: "Non abbiamo che cinque <text:s/>pani e due pesci, a meno che non andiamo noi a comprare viveri per tutta questa gente". <text:s text:c="2"/></text:p>
      <text:p text:style-name="P423">9,14 <text:s/>C'erano infatti circa cinquemila uomini. Egli disse ai discepoli: "Fateli sedere per gruppi di <text:s/>cinquanta". <text:s text:c="2"/></text:p>
      <text:p text:style-name="P424">9,15 <text:s/>Così fecero e li invitarono a sedersi tutti quanti. <text:s text:c="2"/></text:p>
      <text:p text:style-name="P425">9,16 <text:s/>Allora egli prese i cinque pani e i due pesci e, levati gli occhi al cielo, li benedisse, li <text:s/>spezzò e li diede ai discepoli perché li distribuissero alla folla. <text:s text:c="2"/></text:p>
      <text:p text:style-name="P426">9,17 <text:s/>Tutti mangiarono e si saziarono e delle parti loro avanzate furono portate via dodici ceste. <text:s text:c="2"/></text:p>
      <text:p text:style-name="P427">9,18 <text:s/>Un giorno, mentre Gesù si trovava in un luogo appartato a pregare e i discepoli erano con lui, <text:s/>pose loro questa domanda: "Chi sono io secondo la gente?". <text:s text:c="2"/></text:p>
      <text:p text:style-name="P428">9,19 <text:s/>Essi risposero: "Per alcuni Giovanni il Battista, per altri Elia, per altri uno degli antichi <text:s/>profeti che è risorto". <text:s text:c="2"/></text:p>
      <text:p text:style-name="P429">9,20 <text:s/>Allora domandò: "Ma voi chi dite che io sia?". Pietro, prendendo la parola, rispose: "Il Cristo <text:s/>di Dio". <text:s text:c="2"/></text:p>
      <text:p text:style-name="P430">9,21 <text:s/>Egli allora ordinò loro severamente di non riferirlo a nessuno. <text:s text:c="2"/></text:p>
      <text:p text:style-name="P431">9,22 <text:s/>"Il Figlio dell'uomo, disse, deve soffrire molto, essere riprovato dagli anziani, dai sommi <text:s/>sacerdoti e dagli scribi, esser messo a morte e risorgere il terzo giorno". <text:s text:c="2"/></text:p>
      <text:p text:style-name="P432">9,23 <text:s/>E a tutti, diceva: "Se qualcuno vuol venire dietro a me, rinneghi se stesso, prenda la sua croce <text:s/>ogni giorno e mi segua. <text:s text:c="2"/></text:p>
      <text:p text:style-name="P433">9,24 <text:s/>Chi vorrà salvare la propria vita, la perderà, ma chi perderà la propria vita per me, la salverà. <text:s text:c="2"/></text:p>
      <text:p text:style-name="P434">9,25 <text:s/>Che giova all'uomo guadagnare il mondo intero, se poi si perde o rovina se stesso? <text:s text:c="2"/></text:p>
      <text:p text:style-name="P435">9,26 <text:s/>Chi si vergognerà di me e delle mie parole, di lui si vergognerà il Figlio dell'uomo, quando <text:s/>verrà nella gloria sua e del Padre e degli angeli santi. <text:s text:c="2"/></text:p>
      <text:p text:style-name="P436">9,27 <text:s/>In verità vi dico: vi sono alcuni qui presenti, che non morranno prima di aver visto il regno di <text:s/>Dio". <text:s text:c="2"/></text:p>
      <text:p text:style-name="P437">9,28 <text:s/>Circa otto giorni dopo questi discorsi, prese con sé Pietro, Giovanni e Giacomo e salì sul monte <text:s/>a pregare. <text:s text:c="2"/></text:p>
      <text:p text:style-name="P438">9,29 <text:s/>E, mentre pregava, il suo volto cambiò d'aspetto e la sua veste divenne candida e sfolgorante. <text:s text:c="2"/></text:p>
      <text:p text:style-name="P439">9,30 <text:s/>Ed ecco due uomini parlavano con lui: erano Mosè ed Elia, <text:s text:c="2"/></text:p>
      <text:p text:style-name="P440">9,31 <text:s/>apparsi nella loro gloria, e parlavano della sua dipartita che avrebbe portato a compimento a <text:s/>Gerusalemme. <text:s text:c="2"/></text:p>
      <text:soft-page-break/>
      <text:p text:style-name="P441">9,32 <text:s/>Pietro e i suoi compagni erano oppressi dal sonno; tuttavia restarono svegli e videro la sua <text:s/>gloria e i due uomini che stavano con lui. <text:s text:c="2"/></text:p>
      <text:p text:style-name="P442">9,33 <text:s/>Mentre questi si separavano da lui, Pietro disse a Gesù: "Maestro, è bello per noi stare qui. <text:s/>Facciamo tre tende, una per te, una per Mosè e una per Elia". Egli non sapeva quel che diceva. <text:s text:c="2"/></text:p>
      <text:p text:style-name="P443">9,34 <text:s/>Mentre parlava così, venne una nube e li avvolse; all'entrare in quella nube, ebbero paura. <text:s text:c="2"/></text:p>
      <text:p text:style-name="P444">9,35 <text:s/>E dalla nube uscì una voce, che diceva: "Questi è il Figlio mio, l'eletto; ascoltatelo". <text:s text:c="2"/></text:p>
      <text:p text:style-name="P445">9,36 <text:s/>Appena la voce cessò, Gesù restò solo. Essi tacquero e in quei giorni non riferirono ad alcuno <text:s/>ciò che avevano visto. <text:s text:c="2"/></text:p>
      <text:p text:style-name="P446">9,37 <text:s/>Il giorno seguente, quando furon discesi dal monte, una gran folla gli venne incontro. <text:s text:c="2"/></text:p>
      <text:p text:style-name="P447">9,38 <text:s/>A un tratto dalla folla un uomo si mise a gridare: "Maestro, ti prego di volgere lo sguardo a mio <text:s/>figlio, perché è l'unico che ho. <text:s text:c="2"/></text:p>
      <text:p text:style-name="P448">9,39 <text:s/>Ecco, uno spirito lo afferra e subito egli grida, lo scuote ed egli dà schiuma e solo a fatica se <text:s/>ne allontana lasciandolo sfinito. <text:s text:c="2"/></text:p>
      <text:p text:style-name="P449">9,40 <text:s/>Ho pregato i tuoi discepoli di scacciarlo, ma non ci sono riusciti". <text:s text:c="2"/></text:p>
      <text:p text:style-name="P450">9,41 <text:s/>Gesù rispose: "O generazione incredula e perversa, fino a quando sarò con voi e vi sopporterò? <text:s/>Conducimi qui tuo figlio". <text:s text:c="2"/></text:p>
      <text:p text:style-name="P451">9,42 <text:s/>Mentre questi si avvicinava, il demonio lo gettò per terra agitandolo con convulsioni. Gesù <text:s/>minacciò lo spirito immondo, risanò il fanciullo e lo consegnò a suo padre. <text:s text:c="2"/></text:p>
      <text:p text:style-name="P452">9,43 <text:s/>E tutti furono stupiti per la grandezza di Dio. Mentre tutti erano sbalorditi per tutte le cose <text:s/>che faceva, disse ai suoi discepoli: <text:s text:c="2"/></text:p>
      <text:p text:style-name="P453">9,44 <text:s/>"Mettetevi bene in mente queste parole: Il Figlio dell'uomo sta per esser consegnato in mano <text:s/>degli uomini". <text:s text:c="2"/></text:p>
      <text:p text:style-name="P454">9,45 <text:s/>Ma essi non comprendevano questa frase; per loro restava così misteriosa che non ne comprendevano <text:s/>il senso e avevano paura a rivolgergli domande su tale argomento. <text:s text:c="2"/></text:p>
      <text:p text:style-name="P455">9,46 <text:s/>Frattanto sorse una discussione tra loro, chi di essi fosse il più grande. <text:s text:c="2"/></text:p>
      <text:p text:style-name="P456">9,47 <text:s/>Allora Gesù, conoscendo il pensiero del loro cuore, prese un fanciullo, se lo mise vicino e <text:s/>disse: <text:s text:c="2"/></text:p>
      <text:p text:style-name="P457">9,48 <text:s/>"Chi accoglie questo fanciullo nel mio nome, accoglie me; e chi accoglie me, accoglie colui che <text:s/>mi ha mandato. Poiché chi è il più piccolo tra tutti voi, questi è grande". <text:s text:c="2"/></text:p>
      <text:p text:style-name="P458">9,49 <text:s/>Giovanni prese la parola dicendo: "Maestro, abbiamo visto un tale che scacciava demòni nel tuo <text:s/>nome e glielo abbiamo impedito, perché non è con noi tra i tuoi seguaci". <text:s text:c="2"/></text:p>
      <text:p text:style-name="P459">9,50 <text:s/>Ma Gesù gli rispose: "Non glielo impedite, perché chi non è contro di voi, è per voi". <text:s text:c="2"/></text:p>
      <text:p text:style-name="P460">9,51 <text:s/>Mentre stavano compiendosi i giorni in cui sarebbe stato tolto dal mondo, si diresse decisamente <text:s/>verso Gerusalemme <text:s text:c="2"/></text:p>
      <text:p text:style-name="P461">9,52 <text:s/>e mandò avanti dei messaggeri. Questi si incamminarono ed entrarono in un villaggio di Samaritani <text:s/>per fare i preparativi per lui. <text:s text:c="2"/></text:p>
      <text:p text:style-name="P462">9,53 <text:s/>Ma essi non vollero riceverlo, perché era diretto verso Gerusalemme. <text:s text:c="2"/></text:p>
      <text:p text:style-name="P463">9,54 <text:s/>Quando videro ciò, i discepoli Giacomo e Giovanni dissero: "Signore, vuoi che diciamo che scenda <text:s/>un fuoco dal cielo e li consumi?". <text:s text:c="2"/></text:p>
      <text:p text:style-name="P464">9,55 <text:s/>Ma Gesù si voltò e li rimproverò. <text:s text:c="2"/></text:p>
      <text:p text:style-name="P465">9,56 <text:s/>E si avviarono verso un altro villaggio. <text:s text:c="2"/></text:p>
      <text:soft-page-break/>
      <text:p text:style-name="P466">9,57 <text:s/>Mentre andavano per la strada, un tale gli disse: "Ti seguirò dovunque tu vada". <text:s text:c="2"/></text:p>
      <text:p text:style-name="P467">9,58 <text:s/>Gesù gli rispose: "Le volpi hanno le loro tane e gli uccelli del cielo i loro nidi, ma il Figlio <text:s/>dell'uomo non ha dove posare il capo". <text:s text:c="2"/></text:p>
      <text:p text:style-name="P468">9,59 <text:s/>A un altro disse: "Seguimi". E costui rispose: "Signore, concedimi di andare prima a seppellire <text:s/>mio padre". <text:s text:c="2"/></text:p>
      <text:p text:style-name="P469">9,60 <text:s/>Gesù replicò: "Lascia che i morti seppelliscano i loro morti; tu va' e annunzia il regno di Dio". <text:s text:c="2"/></text:p>
      <text:p text:style-name="P470">9,61 <text:s/>Un altro disse: "Ti seguirò, Signore, ma prima lascia che io mi congedi da quelli di casa". <text:s text:c="2"/></text:p>
      <text:p text:style-name="P471">9,62 <text:s/>Ma Gesù gli rispose: "Nessuno che ha messo mano all'aratro e poi si volge indietro, è adatto per <text:s/>il regno di Dio". <text:s text:c="2"/></text:p>
      <text:p text:style-name="P472">10,1 <text:s/>Dopo questi fatti il Signore designò altri settantadue discepoli e li inviò a due a due avanti a <text:s/>sé in ogni città e luogo dove stava per recarsi. <text:s text:c="2"/></text:p>
      <text:p text:style-name="P473">10,2 <text:s/>Diceva loro: "La messe è molta, ma gli operai sono pochi. Pregate dunque il padrone della messe <text:s/>perché mandi operai per la sua messe. <text:s text:c="2"/></text:p>
      <text:p text:style-name="P474">10,3 <text:s/>Andate: ecco io vi mando come agnelli in mezzo a lupi; <text:s text:c="2"/></text:p>
      <text:p text:style-name="P475">10,4 <text:s/>non portate borsa, né bisaccia, né sandali e non salutate nessuno lungo la strada. <text:s text:c="2"/></text:p>
      <text:p text:style-name="P476">10,5 <text:s/>In qualunque casa entriate, prima dite: Pace a questa casa. <text:s text:c="2"/></text:p>
      <text:p text:style-name="P477">10,6 <text:s/>Se vi sarà un figlio della pace, la vostra pace scenderà su di lui, altrimenti ritornerà su di <text:s/>voi. <text:s text:c="2"/></text:p>
      <text:p text:style-name="P478">10,7 <text:s/>Restate in quella casa, mangiando e bevendo di quello che hanno, perché l'operaio è degno della <text:s/>sua mercede. Non passate di casa in casa. <text:s text:c="2"/></text:p>
      <text:p text:style-name="P479">10,8 <text:s/>Quando entrerete in una città e vi accoglieranno, mangiate quello che vi sarà messo dinanzi, <text:s text:c="2"/></text:p>
      <text:p text:style-name="P480">10,9 <text:s/>curate i malati che vi si trovano, e dite loro: È vicino a voi il regno di Dio. <text:s text:c="2"/></text:p>
      <text:p text:style-name="P481">10,10 <text:s/>Ma quando entrerete in una città e non vi accoglieranno, uscite sulle piazze e dite: <text:s text:c="2"/></text:p>
      <text:p text:style-name="P482">10,11 <text:s/>Anche la polvere della vostra città che si è attaccata ai nostri piedi, noi la scuotiamo contro <text:s/>di voi; sappiate però che il regno di Dio è vicino. <text:s text:c="2"/></text:p>
      <text:p text:style-name="P483">10,12 <text:s/>Io vi dico che in quel giorno Sòdoma sarà trattata meno duramente di quella città. <text:s text:c="2"/></text:p>
      <text:p text:style-name="P484">10,13 <text:s/>Guai a te, Corazin, guai a te, Betsàida! Perché se in Tiro e Sidone fossero stati compiuti i <text:s/>miracoli compiuti tra voi, già da tempo si sarebbero convertiti vestendo il sacco e coprendosi di <text:s/>cenere. <text:s text:c="2"/></text:p>
      <text:p text:style-name="P485">10,14 <text:s/>Perciò nel giudizio Tiro e Sidone saranno trattate meno duramente di voi. <text:s text:c="2"/></text:p>
      <text:p text:style-name="P486">10,15 <text:s/>E tu, Cafarnao, sarai innalzata fino al cielo? Fino agli inferi sarai precipitata! <text:s text:c="2"/></text:p>
      <text:p text:style-name="P487">10,16 <text:s/>Chi ascolta voi ascolta me, chi disprezza voi disprezza me. E chi disprezza me disprezza colui <text:s/>che mi ha mandato". <text:s text:c="2"/></text:p>
      <text:p text:style-name="P488">10,17 <text:s/>I settantadue tornarono pieni di gioia dicendo: "Signore, anche i demòni si sottomettono a noi <text:s/>nel tuo nome". <text:s text:c="2"/></text:p>
      <text:p text:style-name="P489">10,18 <text:s/>Egli disse: "Io vedevo satana cadere dal cielo come la folgore. <text:s text:c="2"/></text:p>
      <text:p text:style-name="P490">10,19 <text:s/>Ecco, io vi ho dato il potere di camminare sopra i serpenti e gli scorpioni e sopra ogni potenza <text:s/>del nemico; nulla vi potrà danneggiare. <text:s text:c="2"/></text:p>
      <text:p text:style-name="P491">10,20 <text:s/>Non rallegratevi però perché i demòni si sottomettono a voi; rallegratevi piuttosto che i vostri <text:s/>nomi sono scritti nei cieli". <text:s text:c="2"/></text:p>
      <text:soft-page-break/>
      <text:p text:style-name="P492">10,21 <text:s/>In quello stesso istante Gesù esultò nello Spirito Santo e disse: "Io ti rendo lode, Padre, <text:s/>Signore del cielo e della terra, che hai nascosto queste cose ai dotti e ai sapienti e le hai <text:s/>rivelate ai piccoli. Sì, Padre, perché così a te è piaciuto. <text:s text:c="2"/></text:p>
      <text:p text:style-name="P493">10,22 <text:s/>Ogni cosa mi è stata affidata dal Padre mio e nessuno sa chi è il Figlio se non il Padre, né chi <text:s/>è il Padre se non il Figlio e colui al quale il Figlio lo voglia rivelare". <text:s text:c="2"/></text:p>
      <text:p text:style-name="P494">10,23 <text:s/>E volgendosi ai discepoli, in disparte, disse: "Beati gli occhi che vedono ciò che voi vedete. <text:s text:c="2"/></text:p>
      <text:p text:style-name="P495">10,24 <text:s/>Vi dico che molti profeti e re hanno desiderato vedere ciò che voi vedete, ma non lo videro, e <text:s/>udire ciò che voi udite, ma non l'udirono". <text:s text:c="2"/></text:p>
      <text:p text:style-name="P496">10,25 <text:s/>Un dottore della legge si alzò per metterlo alla prova: "Maestro, che devo fare per ereditare la <text:s/>vita eterna?". <text:s text:c="2"/></text:p>
      <text:p text:style-name="P497">10,26 <text:s/>Gesù gli disse: "Che cosa sta scritto nella Legge? Che cosa vi leggi?". <text:s text:c="2"/></text:p>
      <text:p text:style-name="P498">10,27 <text:s/>Costui rispose: "Amerai il Signore Dio tuo con tutto il tuo cuore, con tutta la tua anima, con <text:s/>tutta la tua forza e con tutta la tua mente e il prossimo tuo come te stesso". <text:s text:c="2"/></text:p>
      <text:p text:style-name="P499">10,28 <text:s/>E Gesù: "Hai risposto bene; fa' questo e vivrai". <text:s text:c="2"/></text:p>
      <text:p text:style-name="P500">10,29 <text:s/>Ma quegli, volendo giustificarsi, disse a Gesù: "E chi è il mio prossimo?". <text:s text:c="2"/></text:p>
      <text:p text:style-name="P501">10,30 <text:s/>Gesù riprese: "Un uomo scendeva da Gerusalemme a Gerico e incappò nei briganti che lo <text:s/>spogliarono, lo percossero e poi se ne andarono, lasciandolo mezzo morto. <text:s text:c="2"/></text:p>
      <text:p text:style-name="P502">10,31 <text:s/>Per caso, un sacerdote scendeva per quella medesima strada e quando lo vide passò oltre <text:s/>dall'altra parte. <text:s text:c="2"/></text:p>
      <text:p text:style-name="P503">10,32 <text:s/>Anche un levita, giunto in quel luogo, lo vide e passò oltre. <text:s text:c="2"/></text:p>
      <text:p text:style-name="P504">10,33 <text:s/>Invece un Samaritano, che era in viaggio, passandogli accanto lo vide e n'ebbe compassione. <text:s text:c="2"/></text:p>
      <text:p text:style-name="P505">10,34 <text:s/>Gli si fece vicino, gli fasciò le ferite, versandovi olio e vino; poi, caricatolo sopra il suo <text:s/>giumento, lo portò a una locanda e si prese cura di lui. <text:s text:c="2"/></text:p>
      <text:p text:style-name="P506">10,35 <text:s/>Il giorno seguente, estrasse due denari e li diede all'albergatore, dicendo: Abbi cura di lui e <text:s/>ciò che spenderai in più, te lo rifonderò al mio ritorno. <text:s text:c="2"/></text:p>
      <text:p text:style-name="P507">10,36 <text:s/>Chi di questi tre ti sembra sia stato il prossimo di colui che è incappato nei briganti?". <text:s text:c="2"/></text:p>
      <text:p text:style-name="P508">10,37 <text:s/>Quegli rispose: "Chi ha avuto compassione di lui". Gesù gli disse: "Va' e anche tu fa' lo <text:s/>stesso". <text:s text:c="2"/></text:p>
      <text:p text:style-name="P509">10,38 <text:s/>Mentre erano in cammino, entrò in un villaggio e una donna, di nome Marta, lo accolse nella sua <text:s/>casa. <text:s text:c="2"/></text:p>
      <text:p text:style-name="P510">10,39 <text:s/>Essa aveva una sorella, di nome Maria, la quale, sedutasi ai piedi di Gesù, ascoltava la sua <text:s/>parola; <text:s text:c="2"/></text:p>
      <text:p text:style-name="P511">10,40 <text:s/>Marta invece era tutta presa dai molti servizi. Pertanto, fattasi avanti, disse: "Signore, non ti <text:s/>curi che mia sorella mi ha lasciata sola a servire? Dille dunque che mi aiuti". <text:s text:c="2"/></text:p>
      <text:p text:style-name="P512">10,41 <text:s/>Ma Gesù le rispose: "Marta, Marta, tu ti preoccupi e ti agiti per molte cose, <text:s text:c="2"/></text:p>
      <text:p text:style-name="P513">10,42 <text:s/>ma una sola è la cosa di cui c'è bisogno. Maria si è scelta la parte migliore, che non le sarà <text:s/>tolta". <text:s text:c="2"/></text:p>
      <text:p text:style-name="P514">11,1 <text:s/>Un giorno Gesù si trovava in un luogo a pregare e quando ebbe finito uno dei discepoli gli disse: <text:s/>"Signore, insegnaci a pregare, come anche Giovanni ha insegnato ai suoi discepoli". <text:s text:c="2"/></text:p>
      <text:p text:style-name="P515">11,2 <text:s/>Ed egli disse loro: "Quando pregate, dite: Padre, sia santificato il tuo nome, venga il tuo <text:s/>regno; <text:s text:c="2"/></text:p>
      <text:soft-page-break/>
      <text:p text:style-name="P516">11,3 <text:s/>dacci ogni giorno il nostro pane quotidiano, <text:s text:c="2"/></text:p>
      <text:p text:style-name="P517">11,4 <text:s/>e perdonaci i nostri peccati, perché anche noi perdoniamo ad ogni nostro debitore, e non ci <text:s/>indurre in tentazione". <text:s text:c="2"/></text:p>
      <text:p text:style-name="P518">11,5 <text:s/>Poi aggiunse: "Se uno di voi ha un amico e va da lui a mezzanotte a dirgli: Amico, prestami tre <text:s/>pani, <text:s text:c="2"/></text:p>
      <text:p text:style-name="P519">11,6 <text:s/>perché è giunto da me un amico da un viaggio e non ho nulla da mettergli davanti; <text:s text:c="2"/></text:p>
      <text:p text:style-name="P520">11,7 <text:s/>e se quegli dall'interno gli risponde: Non m'importunare, la porta è già chiusa e i miei bambini <text:s/>sono a letto con me, non posso alzarmi per darteli; <text:s text:c="2"/></text:p>
      <text:p text:style-name="P521">11,8 <text:s/>vi dico che, se anche non si alzerà a darglieli per amicizia, si alzerà a dargliene quanti gliene <text:s/>occorrono almeno per la sua insistenza. <text:s text:c="2"/></text:p>
      <text:p text:style-name="P522">11,9 <text:s/>Ebbene io vi dico: Chiedete e vi sarà dato, cercate e troverete, bussate e vi sarà aperto. <text:s text:c="2"/></text:p>
      <text:p text:style-name="P523">11,10 <text:s/>Perché chi chiede ottiene, chi cerca trova, e a chi bussa sarà aperto. <text:s text:c="2"/></text:p>
      <text:p text:style-name="P524">11,11 <text:s/>Quale padre tra voi, se il figlio gli chiede un pane, gli darà una pietra? O se gli chiede un <text:s/>pesce, gli darà al posto del pesce una serpe? <text:s text:c="2"/></text:p>
      <text:p text:style-name="P525">11,12 <text:s/>O se gli chiede un uovo, gli darà uno scorpione? <text:s text:c="2"/></text:p>
      <text:p text:style-name="P526">11,13 <text:s/>Se dunque voi, che siete cattivi, sapete dare cose buone ai vostri figli, quanto più il Padre <text:s/>vostro celeste darà lo Spirito Santo a coloro che glielo chiedono!". <text:s text:c="2"/></text:p>
      <text:p text:style-name="P527">11,14 <text:s/>Gesù stava scacciando un demonio che era muto. Uscito il demonio, il muto cominciò a parlare e le <text:s/>folle rimasero meravigliate. <text:s text:c="2"/></text:p>
      <text:p text:style-name="P528">11,15 <text:s/>Ma alcuni dissero: "È in nome di Beelzebùl, capo dei demòni, che egli scaccia i demòni". <text:s text:c="2"/></text:p>
      <text:p text:style-name="P529">11,16 <text:s/>Altri poi, per metterlo alla prova, gli domandavano un segno dal cielo. <text:s text:c="2"/></text:p>
      <text:p text:style-name="P530">11,17 <text:s/>Egli, conoscendo i loro pensieri, disse: "Ogni regno diviso in se stesso va in rovina e una casa <text:s/>cade sull'altra. <text:s text:c="2"/></text:p>
      <text:p text:style-name="P531">11,18 <text:s/>Ora, se anche satana è diviso in se stesso, come potrà stare in piedi il suo regno? Voi dite che <text:s/>io scaccio i demòni in nome di Beelzebùl. <text:s text:c="2"/></text:p>
      <text:p text:style-name="P532">11,19 <text:s/>Ma se io scaccio i demòni in nome di Beelzebùl, i vostri discepoli in nome di chi li scacciano? <text:s/>Perciò essi stessi saranno i vostri giudici. <text:s text:c="2"/></text:p>
      <text:p text:style-name="P533">11,20 <text:s/>Se invece io scaccio i demòni con il dito di Dio, è dunque giunto a voi il regno di Dio. <text:s text:c="2"/></text:p>
      <text:p text:style-name="P534">11,21 <text:s/>Quando un uomo forte, bene armato, fa la guardia al suo palazzo, tutti i suoi beni stanno al <text:s/>sicuro. <text:s text:c="2"/></text:p>
      <text:p text:style-name="P535">11,22 <text:s/>Ma se arriva uno più forte di lui e lo vince, gli strappa via l'armatura nella quale confidava e <text:s/>ne distribuisce il bottino. <text:s text:c="2"/></text:p>
      <text:p text:style-name="P536">11,23 <text:s/>Chi non è con me, è contro di me; e chi non raccoglie con me, disperde. <text:s text:c="2"/></text:p>
      <text:p text:style-name="P537">11,24 <text:s/>Quando lo spirito immondo esce dall'uomo, si aggira per luoghi aridi in cerca di riposo e, non <text:s/>trovandone, dice: Ritornerò nella mia casa da cui sono uscito. <text:s text:c="2"/></text:p>
      <text:p text:style-name="P538">11,25 <text:s/>Venuto, la trova spazzata e adorna. <text:s text:c="2"/></text:p>
      <text:p text:style-name="P539">11,26 <text:s/>Allora va, prende con sé altri sette spiriti peggiori di lui ed essi entrano e vi alloggiano e la <text:s/>condizione finale di quell'uomo diventa peggiore della prima". <text:s text:c="2"/></text:p>
      <text:p text:style-name="P540">11,27 <text:s/>Mentre diceva questo, una donna alzò la voce di mezzo alla folla e disse: "Beato il grembo che ti <text:s/>ha portato e il seno da cui hai preso il latte!". <text:s text:c="2"/></text:p>
      <text:p text:style-name="P541">11,28 <text:s/>Ma egli disse: "Beati piuttosto coloro che ascoltano la parola di Dio e la osservano!". <text:s text:c="2"/></text:p>
      <text:soft-page-break/>
      <text:p text:style-name="P542">11,29 <text:s/>Mentre le folle si accalcavano, Gesù cominciò a dire: "Questa generazione è una generazione <text:s/>malvagia; essa cerca un segno, ma non le sarà dato nessun segno fuorché il segno di Giona. <text:s text:c="2"/></text:p>
      <text:p text:style-name="P543">11,30 <text:s/>Poiché come Giona fu un segno per quelli di Nìnive, così anche il Figlio dell'uomo lo sarà per <text:s/>questa generazione. <text:s text:c="2"/></text:p>
      <text:p text:style-name="P544">11,31 <text:s/>La regina del sud sorgerà nel giudizio insieme con gli uomini di questa generazione e li <text:s/>condannerà; perché essa venne dalle estremità della terra per ascoltare la sapienza di Salomone. <text:s/>Ed ecco, ben più di Salomone c'è qui. <text:s text:c="2"/></text:p>
      <text:p text:style-name="P545">11,32 <text:s/>Quelli di Nìnive sorgeranno nel giudizio insieme con questa generazione e la condanneranno; <text:s/>perché essi alla predicazione di Giona si convertirono. Ed ecco, ben più di Giona c'è qui. <text:s text:c="2"/></text:p>
      <text:p text:style-name="P546">11,33 <text:s/>Nessuno accende una lucerna e la mette in luogo nascosto o sotto il moggio, ma sopra il <text:s/>lucerniere, perché quanti entrano vedano la luce. <text:s text:c="2"/></text:p>
      <text:p text:style-name="P547">11,34 <text:s/>La lucerna del tuo corpo è l'occhio. Se il tuo occhio è sano, anche il tuo corpo è tutto nella <text:s/>luce; ma se è malato, anche il tuo corpo è nelle tenebre. <text:s text:c="2"/></text:p>
      <text:p text:style-name="P548">11,35 <text:s/>Bada dunque che la luce che è in te non sia tenebra. <text:s text:c="2"/></text:p>
      <text:p text:style-name="P549">11,36 <text:s/>Se il tuo corpo è tutto luminoso senza avere alcuna parte nelle tenebre, tutto sarà luminoso, <text:s/>come quando la lucerna ti illumina con il suo bagliore". <text:s text:c="2"/></text:p>
      <text:p text:style-name="P550">11,37 <text:s/>Dopo che ebbe finito di parlare, un fariseo lo invitò a pranzo. Egli entrò e si mise a tavola. <text:s text:c="2"/></text:p>
      <text:p text:style-name="P551">11,38 <text:s/>Il fariseo si meravigliò che non avesse fatto le abluzioni prima del pranzo. <text:s text:c="2"/></text:p>
      <text:p text:style-name="P552">11,39 <text:s/>Allora il Signore gli disse: "Voi farisei purificate l'esterno della coppa e del piatto, ma il <text:s/>vostro interno è pieno di rapina e di iniquità. <text:s text:c="2"/></text:p>
      <text:p text:style-name="P553">11,40 <text:s/>Stolti! Colui che ha fatto l'esterno non ha forse fatto anche l'interno? <text:s text:c="2"/></text:p>
      <text:p text:style-name="P554">11,41 <text:s/>Piuttosto date in elemosina quel che c'è dentro, ed ecco, tutto per voi sarà mondo. <text:s text:c="2"/></text:p>
      <text:p text:style-name="P555">11,42 <text:s/>Ma guai a voi, farisei, che pagate la decima della menta, della ruta e di ogni erbaggio, e poi <text:s/>trasgredite la giustizia e l'amore di Dio. Queste cose bisognava curare senza trascurare le <text:s/>altre. <text:s text:c="2"/></text:p>
      <text:p text:style-name="P556">11,43 <text:s/>Guai a voi, farisei, che avete cari i primi posti nelle sinagoghe e i saluti sulle piazze. <text:s text:c="2"/></text:p>
      <text:p text:style-name="P557">11,44 <text:s/>Guai a voi perché siete come quei sepolcri che non si vedono e la gente vi passa sopra senza <text:s/>saperlo". <text:s text:c="2"/></text:p>
      <text:p text:style-name="P558">11,45 <text:s/>Uno dei dottori della legge intervenne: "Maestro, dicendo questo, offendi anche noi". <text:s text:c="2"/></text:p>
      <text:p text:style-name="P559">11,46 <text:s/>Egli rispose: "Guai anche a voi, dottori della legge, che caricate gli uomini di pesi <text:s/>insopportabili, e quei pesi voi non li toccate nemmeno con un dito! <text:s text:c="2"/></text:p>
      <text:p text:style-name="P560">11,47 <text:s/>Guai a voi, che costruite i sepolcri dei profeti, e i vostri padri li hanno uccisi. <text:s text:c="2"/></text:p>
      <text:p text:style-name="P561">11,48 <text:s/>Così voi date testimonianza e approvazione alle opere dei vostri padri: essi li uccisero e voi <text:s/>costruite loro i sepolcri. <text:s text:c="2"/></text:p>
      <text:p text:style-name="P562">11,49 <text:s/>Per questo la sapienza di Dio ha detto: Manderò a loro profeti e apostoli ed essi li uccideranno <text:s/>e perseguiteranno; <text:s text:c="2"/></text:p>
      <text:p text:style-name="P563">11,50 <text:s/>perché sia chiesto conto a questa generazione del sangue di tutti i profeti, versato fin <text:s/>dall'inizio del mondo, <text:s text:c="2"/></text:p>
      <text:p text:style-name="P564">11,51 <text:s/>dal sangue di Abele fino al sangue di Zaccaria, che fu ucciso tra l'altare e il santuario. Sì, vi <text:s/>dico, ne sarà chiesto conto a questa generazione. <text:s text:c="2"/></text:p>
      <text:soft-page-break/>
      <text:p text:style-name="P565">11,52 <text:s/>Guai a voi, dottori della legge, che avete tolto la chiave della scienza. Voi non siete entrati, <text:s/>e a quelli che volevano entrare l'avete impedito". <text:s text:c="2"/></text:p>
      <text:p text:style-name="P566">11,53 <text:s/>Quando fu uscito di là, gli scribi e i farisei cominciarono a trattarlo ostilmente e a farlo <text:s/>parlare su molti argomenti, <text:s text:c="2"/></text:p>
      <text:p text:style-name="P567">11,54 <text:s/>tendendogli insidie, per sorprenderlo in qualche parola uscita dalla sua stessa bocca. <text:s text:c="2"/></text:p>
      <text:p text:style-name="P568">12,1 <text:s/>Nel frattempo, radunatesi migliaia di persone che si calpestavano a vicenda, Gesù cominciò a dire <text:s/>anzitutto ai discepoli: "Guardatevi dal lievito dei farisei, che è l'ipocrisia. <text:s text:c="2"/></text:p>
      <text:p text:style-name="P569">12,2 <text:s/>Non c'è nulla di nascosto che non sarà svelato, né di segreto che non sarà conosciuto. <text:s text:c="2"/></text:p>
      <text:p text:style-name="P570">12,3 <text:s/>Pertanto ciò che avrete detto nelle tenebre, sarà udito in piena luce; e ciò che avrete detto <text:s/>all'orecchio nelle stanze più interne, sarà annunziato sui tetti. <text:s text:c="2"/></text:p>
      <text:p text:style-name="P571">12,4 <text:s/>A voi miei amici, dico: Non temete coloro che uccidono il corpo e dopo non possono far più nulla. <text:s text:c="2"/></text:p>
      <text:p text:style-name="P572">12,5 <text:s/>Vi mostrerò invece chi dovete temere: temete Colui che, dopo aver ucciso, ha il potere di gettare <text:s/>nella Geenna. Sì, ve lo dico, temete Costui. <text:s text:c="2"/></text:p>
      <text:p text:style-name="P573">12,6 <text:s/>Cinque passeri non si vendono forse per due soldi? Eppure nemmeno uno di essi è dimenticato <text:s/>davanti a Dio. <text:s text:c="2"/></text:p>
      <text:p text:style-name="P574">12,7 <text:s/>Anche i capelli del vostro capo sono tutti contati. Non temete, voi valete più di molti passeri. <text:s text:c="2"/></text:p>
      <text:p text:style-name="P575">12,8 <text:s/>Inoltre vi dico: Chiunque mi riconoscerà davanti agli uomini, anche il Figlio dell'uomo lo <text:s/>riconoscerà davanti agli angeli di Dio; <text:s text:c="2"/></text:p>
      <text:p text:style-name="P576">12,9 <text:s/>ma chi mi rinnegherà davanti agli uomini sarà rinnegato davanti agli angeli di Dio. <text:s text:c="2"/></text:p>
      <text:p text:style-name="P577">12,10 <text:s/>Chiunque parlerà contro il Figlio dell'uomo gli sarà perdonato, ma chi bestemmierà lo Spirito <text:s/>Santo non gli sarà perdonato. <text:s text:c="2"/></text:p>
      <text:p text:style-name="P578">12,11 <text:s/>Quando vi condurranno davanti alle sinagoghe, ai magistrati e alle autorità, non preoccupatevi <text:s/>come discolparvi o che cosa dire; <text:s text:c="2"/></text:p>
      <text:p text:style-name="P579">12,12 <text:s/>perché lo Spirito Santo vi insegnerà in quel momento ciò che bisogna dire". <text:s text:c="2"/></text:p>
      <text:p text:style-name="P580">12,13 <text:s/>Uno della folla gli disse: "Maestro, di' a mio fratello che divida con me l'eredità". <text:s text:c="2"/></text:p>
      <text:p text:style-name="P581">12,14 <text:s/>Ma egli rispose: "O uomo, chi mi ha costituito giudice o mediatore sopra di voi?". <text:s text:c="2"/></text:p>
      <text:p text:style-name="P582">12,15 <text:s/>E disse loro: "Guardatevi e tenetevi lontano da ogni cupidigia, perché anche se uno è <text:s/>nell'abbondanza la sua vita non dipende dai suoi beni". <text:s text:c="2"/></text:p>
      <text:p text:style-name="P583">12,16 <text:s/>Disse poi una parabola: "La campagna di un uomo ricco aveva dato un buon raccolto. <text:s text:c="2"/></text:p>
      <text:p text:style-name="P584">12,17 <text:s/>Egli ragionava tra sé: Che farò, poiché non ho dove riporre i miei raccolti? <text:s text:c="2"/></text:p>
      <text:p text:style-name="P585">12,18 <text:s/>E disse: Farò così: demolirò i miei magazzini e ne costruirò di più grandi e vi raccoglierò tutto <text:s/>il grano e i miei beni. <text:s text:c="2"/></text:p>
      <text:p text:style-name="P586">12,19 <text:s/>Poi dirò a me stesso: Anima mia, hai a disposizione molti beni, per molti anni; riposati, mangia, <text:s/>bevi e datti alla gioia. <text:s text:c="2"/></text:p>
      <text:p text:style-name="P587">12,20 <text:s/>Ma Dio gli disse: Stolto, questa notte stessa ti sarà richiesta la tua vita. E quello che hai <text:s/>preparato di chi sarà? <text:s text:c="2"/></text:p>
      <text:p text:style-name="P588">12,21 <text:s/>Così è di chi accumula tesori per sé, e non arricchisce davanti a Dio". <text:s text:c="2"/></text:p>
      <text:p text:style-name="P589">12,22 <text:s/>Poi disse ai discepoli: "Per questo io vi dico: Non datevi pensiero per la vostra vita, di quello <text:s/>che mangerete; né per il vostro corpo, come lo vestirete. <text:s text:c="2"/></text:p>
      <text:p text:style-name="P590">12,23 <text:s/>La vita vale più del cibo e il corpo più del vestito. <text:s text:c="2"/></text:p>
      <text:soft-page-break/>
      <text:p text:style-name="P591">12,24 <text:s/>Guardate i corvi: non seminano e non mietono, non hanno ripostiglio né granaio, e Dio li nutre. <text:s/>Quanto più degli uccelli voi valete! <text:s text:c="2"/></text:p>
      <text:p text:style-name="P592">12,25 <text:s/>Chi di voi, per quanto si affanni, può aggiungere un'ora sola alla sua vita? <text:s text:c="2"/></text:p>
      <text:p text:style-name="P593">12,26 <text:s/>Se dunque non avete potere neanche per la più piccola cosa, perché vi affannate del resto? <text:s text:c="2"/></text:p>
      <text:p text:style-name="P594">12,27 <text:s/>Guardate i gigli, come crescono: non filano, non tessono: eppure io vi dico che neanche Salomone, <text:s/>con tutta la sua gloria, vestiva come uno di loro. <text:s text:c="2"/></text:p>
      <text:p text:style-name="P595">12,28 <text:s/>Se dunque Dio veste così l'erba del campo, che oggi c'è e domani si getta nel forno, quanto più <text:s/>voi, gente di poca fede? <text:s text:c="2"/></text:p>
      <text:p text:style-name="P596">12,29 <text:s/>Non cercate perciò che cosa mangerete e berrete, e non state con l'animo in ansia: <text:s text:c="2"/></text:p>
      <text:p text:style-name="P597">12,30 <text:s/>di tutte queste cose si preoccupa la gente del mondo; ma il Padre vostro sa che ne avete bisogno. <text:s text:c="2"/></text:p>
      <text:p text:style-name="P598">12,31 <text:s/>Cercate piuttosto il regno di Dio, e queste cose vi saranno date in aggiunta. <text:s text:c="2"/></text:p>
      <text:p text:style-name="P599">12,32 <text:s/>Non temere, piccolo gregge, perché al Padre vostro è piaciuto di darvi il suo regno. <text:s text:c="2"/></text:p>
      <text:p text:style-name="P600">12,33 <text:s/>Vendete ciò che avete e datelo in elemosina; fatevi borse che non invecchiano, un tesoro <text:s/>inesauribile nei cieli, dove i ladri non arrivano e la tignola non consuma. <text:s text:c="2"/></text:p>
      <text:p text:style-name="P601">12,34 <text:s/>Perché dove è il vostro tesoro, là sarà anche il vostro cuore. <text:s text:c="2"/></text:p>
      <text:p text:style-name="P602">12,35 <text:s/>Siate pronti, con la cintura ai fianchi e le lucerne accese; <text:s text:c="2"/></text:p>
      <text:p text:style-name="P603">12,36 <text:s/>siate simili a coloro che aspettano il padrone quando torna dalle nozze, per aprirgli subito, <text:s/>appena arriva e bussa. <text:s text:c="2"/></text:p>
      <text:p text:style-name="P604">12,37 <text:s/>Beati quei servi che il padrone al suo ritorno troverà ancora svegli; in verità vi dico, si <text:s/>cingerà le sue vesti, li farà mettere a tavola e passerà a servirli. <text:s text:c="2"/></text:p>
      <text:p text:style-name="P605">12,38 <text:s/>E se, giungendo nel mezzo della notte o prima dell'alba, li troverà così, beati loro! <text:s text:c="2"/></text:p>
      <text:p text:style-name="P606">12,39 <text:s/>Sappiate bene questo: se il padrone di casa sapesse a che ora viene il ladro, non si lascerebbe <text:s/>scassinare la casa. <text:s text:c="2"/></text:p>
      <text:p text:style-name="P607">12,40 <text:s/>Anche voi tenetevi pronti, perché il Figlio dell'uomo verrà nell'ora che non pensate". <text:s text:c="2"/></text:p>
      <text:p text:style-name="P608">12,41 <text:s/>Allora Pietro disse: "Signore, questa parabola la dici per noi o anche per tutti?". <text:s text:c="2"/></text:p>
      <text:p text:style-name="P609">12,42 <text:s/>Il Signore rispose: "Qual è dunque l'amministratore fedele e saggio, che il Signore porrà a capo <text:s/>della sua servitù, per distribuire a tempo debito la razione di cibo? <text:s text:c="2"/></text:p>
      <text:p text:style-name="P610">12,43 <text:s/>Beato quel servo che il padrone, arrivando, troverà al suo lavoro. <text:s text:c="2"/></text:p>
      <text:p text:style-name="P611">12,44 <text:s/>In verità vi dico, lo metterà a capo di tutti i suoi averi. <text:s text:c="2"/></text:p>
      <text:p text:style-name="P612">12,45 <text:s/>Ma se quel servo dicesse in cuor suo: Il padrone tarda a venire, e cominciasse a percuotere i <text:s/>servi e le serve, a mangiare, a bere e a ubriacarsi, <text:s text:c="2"/></text:p>
      <text:p text:style-name="P613">12,46 <text:s/>il padrone di quel servo arriverà nel giorno in cui meno se l'aspetta e in un'ora che non sa, e <text:s/>lo punirà con rigore, assegnandogli il posto fra gli infedeli. <text:s text:c="2"/></text:p>
      <text:p text:style-name="P614">12,47 <text:s/>Il servo che, conoscendo la volontà del padrone, non avrà disposto o agito secondo la sua <text:s/>volontà, riceverà molte percosse; <text:s text:c="2"/></text:p>
      <text:p text:style-name="P615">12,48 <text:s/>quello invece che, non conoscendola, avrà fatto cose meritevoli di percosse, ne riceverà poche. A <text:s/>chiunque fu dato molto, molto sarà chiesto; a chi fu affidato molto, sarà richiesto molto di più. <text:s text:c="2"/></text:p>
      <text:p text:style-name="P616">12,49 <text:s/>Sono venuto a portare il fuoco sulla terra; e come vorrei che fosse già acceso! <text:s text:c="2"/></text:p>
      <text:soft-page-break/>
      <text:p text:style-name="P617">12,50 <text:s/>C'è un battesimo che devo ricevere; e come sono angosciato, finché non sia compiuto! <text:s text:c="2"/></text:p>
      <text:p text:style-name="P618">12,51 <text:s/>Pensate che io sia venuto a portare la pace sulla terra? No, vi dico, ma la divisione. <text:s text:c="2"/></text:p>
      <text:p text:style-name="P619">12,52 <text:s/>D'ora innanzi in una casa di cinque persone <text:s text:c="2"/></text:p>
      <text:p text:style-name="P620">12,53 <text:s/>si divideranno tre contro due e due contro tre; padre contro figlio e figlio contro padre, madre <text:s/>contro figlia e figlia contro madre, suocera contro nuora e nuora contro suocera". <text:s text:c="2"/></text:p>
      <text:p text:style-name="P621">12,54 <text:s/>Diceva ancora alle folle: "Quando vedete una nuvola salire da ponente, subito dite: Viene la <text:s/>pioggia, e così accade. <text:s text:c="2"/></text:p>
      <text:p text:style-name="P622">12,55 <text:s/>E quando soffia lo scirocco, dite: Ci sarà caldo, e così accade. <text:s text:c="2"/></text:p>
      <text:p text:style-name="P623">12,56 <text:s/>Ipocriti! Sapete giudicare l'aspetto della terra e del cielo, come mai questo tempo non sapete <text:s/>giudicarlo? <text:s text:c="2"/></text:p>
      <text:p text:style-name="P624">12,57 <text:s/>E perché non giudicate da voi stessi ciò che è giusto? <text:s text:c="2"/></text:p>
      <text:p text:style-name="P625">12,58 <text:s/>Quando vai con il tuo avversario davanti al magistrato, lungo la strada procura di accordarti con <text:s/>lui, perché non ti trascini davanti al giudice e il giudice ti consegni all'esecutore e questi ti <text:s/>getti in prigione. <text:s text:c="2"/></text:p>
      <text:p text:style-name="P626">12,59 <text:s/>Ti assicuro, non ne uscirai finché non avrai pagato fino all'ultimo spicciolo". <text:s text:c="2"/></text:p>
      <text:p text:style-name="P627">13,1 <text:s/>In quello stesso tempo si presentarono alcuni a riferirgli circa quei Galilei, il cui sangue <text:s/>Pilato aveva mescolato con quello dei loro sacrifici. <text:s text:c="2"/></text:p>
      <text:p text:style-name="P628">13,2 <text:s/>Prendendo la parola, Gesù rispose: "Credete che quei Galilei fossero più peccatori di tutti i <text:s/>Galilei, per aver subito tale sorte? <text:s text:c="2"/></text:p>
      <text:p text:style-name="P629">13,3 <text:s/>No, vi dico, ma se non vi convertite, perirete tutti allo stesso modo. <text:s text:c="2"/></text:p>
      <text:p text:style-name="P630">13,4 <text:s/>O quei diciotto, sopra i quali rovinò la torre di Sìloe e li uccise, credete che fossero più <text:s/>colpevoli di tutti gli abitanti di Gerusalemme? <text:s text:c="2"/></text:p>
      <text:p text:style-name="P631">13,5 <text:s/>No, vi dico, ma se non vi convertite, perirete tutti allo stesso modo". <text:s text:c="2"/></text:p>
      <text:p text:style-name="P632">13,6 <text:s/>Disse anche questa parabola: "Un tale aveva un fico piantato nella vigna e venne a cercarvi <text:s/>frutti, ma non ne trovò. <text:s text:c="2"/></text:p>
      <text:p text:style-name="P633">13,7 <text:s/>Allora disse al vignaiolo: Ecco, son tre anni che vengo a cercare frutti su questo fico, ma non <text:s/>ne trovo. Taglialo. Perché deve sfruttare il terreno? <text:s text:c="2"/></text:p>
      <text:p text:style-name="P634">13,8 <text:s/>Ma quegli rispose: Padrone, lascialo ancora quest'anno finché io gli zappi attorno e vi metta il <text:s/>concime <text:s text:c="2"/></text:p>
      <text:p text:style-name="P635">13,9 <text:s/>e vedremo se porterà frutto per l'avvenire; se no, lo taglierai". <text:s text:c="2"/></text:p>
      <text:p text:style-name="P636">13,10 <text:s/>Una volta stava insegnando in una sinagoga il giorno di sabato. <text:s text:c="2"/></text:p>
      <text:p text:style-name="P637">13,11 <text:s/>C'era là una donna che aveva da diciotto anni uno spirito che la teneva inferma; era curva e non <text:s/>poteva drizzarsi in nessun modo. <text:s text:c="2"/></text:p>
      <text:p text:style-name="P638">13,12 <text:s/>Gesù la vide, la chiamò a sé e le disse: "Donna, sei libera dalla tua infermità", <text:s text:c="2"/></text:p>
      <text:p text:style-name="P639">13,13 <text:s/>e le impose le mani. Subito quella si raddrizzò e glorificava Dio. <text:s text:c="2"/></text:p>
      <text:p text:style-name="P640">13,14 <text:s/>Ma il capo della sinagoga, sdegnato perché Gesù aveva operato quella guarigione di sabato, <text:s/>rivolgendosi alla folla disse: "Ci sono sei giorni in cui si deve lavorare; in quelli dunque <text:s/>venite a farvi curare e non in giorno di sabato". <text:s text:c="2"/></text:p>
      <text:p text:style-name="P641">13,15 <text:s/>Il Signore replicò: "Ipocriti, non scioglie forse, di sabato, ciascuno di voi il bue o l'asino <text:s/>dalla mangiatoia, per condurlo ad abbeverarsi? <text:s text:c="2"/></text:p>
      <text:p text:style-name="P642">13,16 <text:s/>E questa figlia di Abramo, che satana ha tenuto legata diciott'anni, non doveva essere sciolta da <text:s/>questo legame in giorno di sabato?". <text:s text:c="2"/></text:p>
      <text:soft-page-break/>
      <text:p text:style-name="P643">13,17 <text:s/>Quando egli diceva queste cose, tutti i suoi avversari si vergognavano, mentre la folla intera <text:s/>esultava per tutte le meraviglie da lui compiute. <text:s text:c="2"/></text:p>
      <text:p text:style-name="P644">13,18 <text:s/>Diceva dunque: "A che cosa è simile il regno di Dio, e a che cosa lo rassomiglierò? <text:s text:c="2"/></text:p>
      <text:p text:style-name="P645">13,19 <text:s/>È simile a un granellino di senapa, che un uomo ha preso e gettato nell'orto; poi è cresciuto e <text:s/>diventato un arbusto, e gli uccelli del cielo si sono posati tra i suoi rami". <text:s text:c="2"/></text:p>
      <text:p text:style-name="P646">13,20 <text:s/>E ancora: "A che cosa rassomiglierò il regno di Dio? <text:s text:c="2"/></text:p>
      <text:p text:style-name="P647">13,21 <text:s/>È simile al lievito che una donna ha preso e nascosto in tre staia di farina, finché sia tutta <text:s/>fermentata". <text:s text:c="2"/></text:p>
      <text:p text:style-name="P648">13,22 <text:s/>Passava per città e villaggi, insegnando, mentre camminava verso Gerusalemme. <text:s text:c="2"/></text:p>
      <text:p text:style-name="P649">13,23 <text:s/>Un tale gli chiese: "Signore, sono pochi quelli che si salvano?". Rispose: <text:s text:c="2"/></text:p>
      <text:p text:style-name="P650">13,24 <text:s/>"Sforzatevi di entrare per la porta stretta, perché molti, vi dico, cercheranno di entrarvi, ma <text:s/>non ci riusciranno. <text:s text:c="2"/></text:p>
      <text:p text:style-name="P651">13,25 <text:s/>Quando il padrone di casa si alzerà e chiuderà la porta, rimasti fuori, comincerete a bussare <text:s/>alla porta, dicendo: Signore, aprici. Ma egli vi risponderà: Non vi conosco, non so di dove <text:s/>siete. <text:s text:c="2"/></text:p>
      <text:p text:style-name="P652">13,26 <text:s/>Allora comincerete a dire: Abbiamo mangiato e bevuto in tua presenza e tu hai insegnato nelle <text:s/>nostre piazze. <text:s text:c="2"/></text:p>
      <text:p text:style-name="P653">13,27 <text:s/>Ma egli dichiarerà: Vi dico che non so di dove siete. Allontanatevi da me voi tutti operatori <text:s/>d'iniquità! <text:s text:c="2"/></text:p>
      <text:p text:style-name="P654">13,28 <text:s/>Là ci sarà pianto e stridore di denti, quando vedrete Abramo, Isacco e Giacobbe e tutti i profeti <text:s/>nel regno di Dio, e voi cacciati fuori. <text:s text:c="2"/></text:p>
      <text:p text:style-name="P655">13,29 <text:s/>Verranno da oriente e da occidente, da settentrione e da mezzogiorno e siederanno a mensa nel <text:s/>regno di Dio. <text:s text:c="2"/></text:p>
      <text:p text:style-name="P656">13,30 <text:s/>Ed ecco, ci sono alcuni tra gli ultimi che saranno primi e alcuni tra i primi che saranno <text:s/>ultimi". <text:s text:c="2"/></text:p>
      <text:p text:style-name="P657">13,31 <text:s/>In quel momento si avvicinarono alcuni farisei a dirgli: "Parti e vattene via di qui, perché <text:s/>Erode ti vuole uccidere". <text:s text:c="2"/></text:p>
      <text:p text:style-name="P658">13,32 <text:s/>Egli rispose: "Andate a dire a quella volpe: Ecco, io scaccio i demòni e compio guarigioni oggi e <text:s/>domani; e il terzo giorno avrò finito. <text:s text:c="2"/></text:p>
      <text:p text:style-name="P659">13,33 <text:s/>Però è necessario che oggi, domani e il giorno seguente io vada per la mia strada, perché non è <text:s/>possibile che un profeta muoia fuori di Gerusalemme. <text:s text:c="2"/></text:p>
      <text:p text:style-name="P660">13,34 <text:s/>Gerusalemme, Gerusalemme, che uccidi i profeti e lapidi coloro che sono mandati a te, quante <text:s/>volte ho voluto raccogliere i tuoi figli come una gallina la sua covata sotto le ali e voi non <text:s/>avete voluto! <text:s text:c="2"/></text:p>
      <text:p text:style-name="P661">13,35 <text:s/>Ecco, la vostra casa sta per esservi lasciata deserta! Vi dico infatti che non mi vedrete più <text:s/>fino al tempo in cui direte: Benedetto colui che viene nel nome del Signore!". <text:s text:c="2"/></text:p>
      <text:p text:style-name="P662">14,1 <text:s/>Un sabato era entrato in casa di uno dei capi dei farisei per pranzare e la gente stava ad <text:s/>osservarlo. <text:s text:c="2"/></text:p>
      <text:p text:style-name="P663">14,2 <text:s/>Davanti a lui stava un idropico. <text:s text:c="2"/></text:p>
      <text:p text:style-name="P664">14,3 <text:s/>Rivolgendosi ai dottori della legge e ai farisei, Gesù disse: "È lecito o no curare di sabato?". <text:s text:c="2"/></text:p>
      <text:p text:style-name="P665">14,4 <text:s/>Ma essi tacquero. Egli lo prese per mano, lo guarì e lo congedò. <text:s text:c="2"/></text:p>
      <text:p text:style-name="P666">14,5 <text:s/>Poi disse: "Chi di voi, se un asino o un bue gli cade nel pozzo, non lo tirerà subito fuori in <text:s/>giorno di sabato?". <text:s text:c="2"/></text:p>
      <text:p text:style-name="P667">14,6 <text:s/>E non potevano rispondere nulla a queste parole. <text:s text:c="2"/></text:p>
      <text:soft-page-break/>
      <text:p text:style-name="P668">14,7 <text:s/>Osservando poi come gli invitati sceglievano i primi posti, disse loro una parabola: <text:s text:c="2"/></text:p>
      <text:p text:style-name="P669">14,8 <text:s/>"Quando sei invitato a nozze da qualcuno, non metterti al primo posto, perché non ci sia un altro <text:s/>invitato più ragguardevole di te <text:s text:c="2"/></text:p>
      <text:p text:style-name="P670">14,9 <text:s/>e colui che ha invitato te e lui venga a dirti: Cedigli il posto! Allora dovrai con vergogna <text:s/>occupare l'ultimo posto. <text:s text:c="2"/></text:p>
      <text:p text:style-name="P671">14,10 <text:s/>Invece quando sei invitato, va' a metterti all'ultimo posto, perché venendo colui che ti ha <text:s/>invitato ti dica: Amico, passa più avanti. Allora ne avrai onore davanti a tutti i commensali. <text:s text:c="2"/></text:p>
      <text:p text:style-name="P672">14,11 <text:s/>Perché chiunque si esalta sarà umiliato, e chi si umilia sarà esaltato". <text:s text:c="2"/></text:p>
      <text:p text:style-name="P673">14,12 <text:s/>Disse poi a colui che l'aveva invitato: "Quando offri un pranzo o una cena, non invitare i tuoi <text:s/>amici, né i tuoi fratelli, né i tuoi parenti, né i ricchi vicini, perché anch'essi non ti <text:s/>invitino a loro volta e tu abbia il contraccambio. <text:s text:c="2"/></text:p>
      <text:p text:style-name="P674">14,13 <text:s/>Al contrario, quando dài un banchetto, invita poveri, storpi, zoppi, ciechi; <text:s text:c="2"/></text:p>
      <text:p text:style-name="P675">14,14 <text:s/>e sarai beato perché non hanno da ricambiarti. Riceverai infatti la tua ricompensa alla <text:s/>risurrezione dei giusti". <text:s text:c="2"/></text:p>
      <text:p text:style-name="P676">14,15 <text:s/>Uno dei commensali, avendo udito ciò, gli disse: "Beato chi mangerà il pane nel regno di Dio!". <text:s text:c="2"/></text:p>
      <text:p text:style-name="P677">14,16 <text:s/>Gesù rispose: "Un uomo diede una grande cena e fece molti inviti. <text:s text:c="2"/></text:p>
      <text:p text:style-name="P678">14,17 <text:s/>All'ora della cena, mandò il suo servo a dire agli invitati: Venite, è pronto. <text:s text:c="2"/></text:p>
      <text:p text:style-name="P679">14,18 <text:s/>Ma tutti, all'unanimità, cominciarono a scusarsi. Il primo disse: Ho comprato un campo e devo <text:s/>andare a vederlo; ti prego, considerami giustificato. <text:s text:c="2"/></text:p>
      <text:p text:style-name="P680">14,19 <text:s/>Un altro disse: Ho comprato cinque paia di buoi e vado a provarli; ti prego, considerami <text:s/>giustificato. <text:s text:c="2"/></text:p>
      <text:p text:style-name="P681">14,20 <text:s/>Un altro disse: Ho preso moglie e perciò non posso venire. <text:s text:c="2"/></text:p>
      <text:p text:style-name="P682">14,21 <text:s/>Al suo ritorno il servo riferì tutto questo al padrone. Allora il padrone di casa, irritato, <text:s/>disse al servo: Esci subito per le piazze e per le vie della città e conduci qui poveri, storpi, <text:s/>ciechi e zoppi. <text:s text:c="2"/></text:p>
      <text:p text:style-name="P683">14,22 <text:s/>Il servo disse: Signore, è stato fatto come hai ordinato, ma c'è ancora posto. <text:s text:c="2"/></text:p>
      <text:p text:style-name="P684">14,23 <text:s/>Il padrone allora disse al servo: Esci per le strade e lungo le siepi, spingili a entrare, perché <text:s/>la mia casa si riempia. <text:s text:c="2"/></text:p>
      <text:p text:style-name="P685">14,24 <text:s/>Perché vi dico: Nessuno di quegli uomini che erano stati invitati assaggerà la mia cena". <text:s text:c="2"/></text:p>
      <text:p text:style-name="P686">14,25 <text:s/>Siccome molta gente andava con lui, egli si voltò e disse: <text:s text:c="2"/></text:p>
      <text:p text:style-name="P687">14,26 <text:s/>"Se uno viene a me e non odia suo padre, sua madre, la moglie, i figli, i fratelli, le sorelle e <text:s/>perfino la propria vita, non può essere mio discepolo. <text:s text:c="2"/></text:p>
      <text:p text:style-name="P688">14,27 <text:s/>Chi non porta la propria croce e non viene dietro di me, non può essere mio discepolo. <text:s text:c="2"/></text:p>
      <text:p text:style-name="P689">14,28 <text:s/>Chi di voi, volendo costruire una torre, non si siede prima a calcolarne la spesa, se ha i mezzi <text:s/>per portarla a compimento? <text:s text:c="2"/></text:p>
      <text:p text:style-name="P690">14,29 <text:s/>Per evitare che, se getta le fondamenta e non può finire il lavoro, tutti coloro che vedono <text:s/>comincino a deriderlo, dicendo: <text:s text:c="2"/></text:p>
      <text:p text:style-name="P691">14,30 <text:s/>Costui ha iniziato a costruire, ma non è stato capace di finire il lavoro. <text:s text:c="2"/></text:p>
      <text:p text:style-name="P692">14,31 <text:s/>Oppure quale re, partendo in guerra contro un altro re, non siede prima a esaminare se può <text:s/>affrontare con diecimila uomini chi gli viene incontro con ventimila? <text:s text:c="2"/></text:p>
      <text:p text:style-name="P693">14,32 <text:s/>Se no, mentre l'altro è ancora lontano, gli manda un'ambasceria per la pace. <text:s text:c="2"/></text:p>
      <text:soft-page-break/>
      <text:p text:style-name="P694">14,33 <text:s/>Così chiunque di voi non rinunzia a tutti i suoi averi, non può essere mio discepolo. <text:s text:c="2"/></text:p>
      <text:p text:style-name="P695">14,34 <text:s/>Il sale è buono, ma se anche il sale perdesse il sapore, con che cosa lo si salerà? <text:s text:c="2"/></text:p>
      <text:p text:style-name="P696">14,35 <text:s/>Non serve né per la terra né per il concime e così lo buttano via. Chi ha orecchi per intendere, <text:s/>intenda". <text:s text:c="2"/></text:p>
      <text:p text:style-name="P697">15,1 <text:s/>Si avvicinavano a lui tutti i pubblicani e i peccatori per ascoltarlo. <text:s text:c="2"/></text:p>
      <text:p text:style-name="P698">15,2 <text:s/>I farisei e gli scribi mormoravano: "Costui riceve i peccatori e mangia con loro". <text:s text:c="2"/></text:p>
      <text:p text:style-name="P699">15,3 <text:s/>Allora egli disse loro questa parabola: <text:s text:c="2"/></text:p>
      <text:p text:style-name="P700">15,4 <text:s/>"Chi di voi se ha cento pecore e ne perde una, non lascia le novantanove nel deserto e va dietro <text:s/>a quella perduta, finché non la ritrova? <text:s text:c="2"/></text:p>
      <text:p text:style-name="P701">15,5 <text:s/>Ritrovatala, se la mette in spalla tutto contento, <text:s text:c="2"/></text:p>
      <text:p text:style-name="P702">15,6 <text:s/>va a casa, chiama gli amici e i vicini dicendo: Rallegratevi con me, perché ho trovato la mia <text:s/>pecora che era perduta. <text:s text:c="2"/></text:p>
      <text:p text:style-name="P703">15,7 <text:s/>Così, vi dico, ci sarà più gioia in cielo per un peccatore convertito, che per novantanove giusti <text:s/>che non hanno bisogno di conversione. <text:s text:c="2"/></text:p>
      <text:p text:style-name="P704">15,8 <text:s/>O quale donna, se ha dieci dramme e ne perde una, non accende la lucerna e spazza la casa e cerca <text:s/>attentamente finché non la ritrova? <text:s text:c="2"/></text:p>
      <text:p text:style-name="P705">15,9 <text:s/>E dopo averla trovata, chiama le amiche e le vicine, dicendo: Rallegratevi con me, perché ho <text:s/>ritrovato la dramma che avevo perduta. <text:s text:c="2"/></text:p>
      <text:p text:style-name="P706">15,10 <text:s/>Così, vi dico, c'è gioia davanti agli angeli di Dio per un solo peccatore che si converte". <text:s text:c="2"/></text:p>
      <text:p text:style-name="P707">15,11 <text:s/>Disse ancora: "Un uomo aveva due figli. <text:s text:c="2"/></text:p>
      <text:p text:style-name="P708">15,12 <text:s/>Il più giovane disse al padre: Padre, dammi la parte del patrimonio che mi spetta. E il padre <text:s/>divise tra loro le sostanze. <text:s text:c="2"/></text:p>
      <text:p text:style-name="P709">15,13 <text:s/>Dopo non molti giorni, il figlio più giovane, raccolte le sue cose, partì per un paese lontano e <text:s/>là sperperò le sue sostanze vivendo da dissoluto. <text:s text:c="2"/></text:p>
      <text:p text:style-name="P710">15,14 <text:s/>Quando ebbe speso tutto, in quel paese venne una grande carestia ed egli cominciò a trovarsi nel <text:s/>bisogno. <text:s text:c="2"/></text:p>
      <text:p text:style-name="P711">15,15 <text:s/>Allora andò e si mise a servizio di uno degli abitanti di quella regione, che lo mandò nei campi <text:s/>a pascolare i porci. <text:s text:c="2"/></text:p>
      <text:p text:style-name="P712">15,16 <text:s/>Avrebbe voluto saziarsi con le carrube che mangiavano i porci; ma nessuno gliene dava. <text:s text:c="2"/></text:p>
      <text:p text:style-name="P713">15,17 <text:s/>Allora rientrò in se stesso e disse: Quanti salariati in casa di mio padre hanno pane in <text:s/>abbondanza e io qui muoio di fame! <text:s text:c="2"/></text:p>
      <text:p text:style-name="P714">15,18 <text:s/>Mi leverò e andrò da mio padre e gli dirò: Padre, ho peccato contro il Cielo e contro di te; <text:s text:c="2"/></text:p>
      <text:p text:style-name="P715">15,19 <text:s/>non sono più degno di esser chiamato tuo figlio. Trattami come uno dei tuoi garzoni. <text:s text:c="2"/></text:p>
      <text:p text:style-name="P716">15,20 <text:s/>Partì e si incamminò verso suo padre. Quando era ancora lontano, il padre lo vide e commosso gli <text:s/>corse incontro, gli si gettò al collo e lo baciò. <text:s text:c="2"/></text:p>
      <text:p text:style-name="P717">15,21 <text:s/>Il figlio gli disse: Padre, ho peccato contro il Cielo e contro di te; non sono più degno di <text:s/>esser chiamato tuo figlio. <text:s text:c="2"/></text:p>
      <text:p text:style-name="P718">15,22 <text:s/>Ma il padre disse ai servi: Presto, portate qui il vestito più bello e rivestitelo, mettetegli <text:s/>l'anello al dito e i calzari ai piedi. <text:s text:c="2"/></text:p>
      <text:p text:style-name="P719">15,23 <text:s/>Portate il vitello grasso, ammazzatelo, mangiamo e facciamo festa, <text:s text:c="2"/></text:p>
      <text:soft-page-break/>
      <text:p text:style-name="P720">15,24 <text:s/>perché questo mio figlio era morto ed è tornato in vita, era perduto ed è stato ritrovato. E <text:s/>cominciarono a far festa. <text:s text:c="2"/></text:p>
      <text:p text:style-name="P721">15,25 <text:s/>Il figlio maggiore si trovava nei campi. Al ritorno, quando fu vicino a casa, udì la musica e le <text:s/>danze; <text:s text:c="2"/></text:p>
      <text:p text:style-name="P722">15,26 <text:s/>chiamò un servo e gli domandò che cosa fosse tutto ciò. <text:s text:c="2"/></text:p>
      <text:p text:style-name="P723">15,27 <text:s/>Il servo gli rispose: È tornato tuo fratello e il padre ha fatto ammazzare il vitello grasso, <text:s/>perché lo ha riavuto sano e salvo. <text:s text:c="2"/></text:p>
      <text:p text:style-name="P724">15,28 <text:s/>Egli si indignò, e non voleva entrare. Il padre allora uscì a pregarlo. <text:s text:c="2"/></text:p>
      <text:p text:style-name="P725">15,29 <text:s/>Ma lui rispose a suo padre: Ecco, io ti servo da tanti anni e non ho mai trasgredito un tuo <text:s/>comando, e tu non mi hai dato mai un capretto per far festa con i miei amici. <text:s text:c="2"/></text:p>
      <text:p text:style-name="P726">15,30 <text:s/>Ma ora che questo tuo figlio che ha divorato i tuoi averi con le prostitute è tornato, per lui <text:s/>hai ammazzato il vitello grasso. <text:s text:c="2"/></text:p>
      <text:p text:style-name="P727">15,31 <text:s/>Gli rispose il padre: Figlio, tu sei sempre con me e tutto ciò che è mio è tuo; <text:s text:c="2"/></text:p>
      <text:p text:style-name="P728">15,32 <text:s/>ma bisognava far festa e rallegrarsi, perché questo tuo fratello era morto ed è tornato in vita, <text:s/>era perduto ed è stato ritrovato". <text:s text:c="2"/></text:p>
      <text:p text:style-name="P729">16,1 <text:s/>Diceva anche ai discepoli: "C'era un uomo ricco che aveva un amministratore, e questi fu accusato <text:s/>dinanzi a lui di sperperare i suoi averi. <text:s text:c="2"/></text:p>
      <text:p text:style-name="P730">16,2 <text:s/>Lo chiamò e gli disse: Che è questo che sento dire di te? Rendi conto della tua amministrazione, <text:s/>perché non puoi più essere amministratore. <text:s text:c="2"/></text:p>
      <text:p text:style-name="P731">16,3 <text:s/>L'amministratore disse tra sé: Che farò ora che il mio padrone mi toglie l'amministrazione? <text:s/>Zappare, non ho forza, mendicare, mi vergogno. <text:s text:c="2"/></text:p>
      <text:p text:style-name="P732">16,4 <text:s/>So io che cosa fare perché, quando sarò stato allontanato dall'amministrazione, ci sia qualcuno <text:s/>che mi accolga in casa sua. <text:s text:c="2"/></text:p>
      <text:p text:style-name="P733">16,5 <text:s/>Chiamò uno per uno i debitori del padrone e disse al primo: <text:s text:c="2"/></text:p>
      <text:p text:style-name="P734">16,6 <text:s/>Tu quanto devi al mio padrone? Quello rispose: Cento barili d'olio. Gli disse: Prendi la tua <text:s/>ricevuta, siediti e scrivi subito cinquanta. <text:s text:c="2"/></text:p>
      <text:p text:style-name="P735">16,7 <text:s/>Poi disse a un altro: Tu quanto devi? Rispose: Cento misure di grano. Gli disse: Prendi la tua <text:s/>ricevuta e scrivi ottanta. <text:s text:c="2"/></text:p>
      <text:p text:style-name="P736">16,8 <text:s/>Il padrone lodò quell'amministratore disonesto, perché aveva agito con scaltrezza. I figli di <text:s/>questo mondo, infatti, verso i loro pari sono più scaltri dei figli della luce. <text:s text:c="2"/></text:p>
      <text:p text:style-name="P737">16,9 <text:s/>Ebbene, io vi dico: Procuratevi amici con la iniqua ricchezza, perché, quand'essa verrà a <text:s/>mancare, vi accolgano nelle dimore eterne. <text:s text:c="2"/></text:p>
      <text:p text:style-name="P738">16,10 <text:s/>Chi è fedele nel poco, è fedele anche nel molto; e chi è disonesto nel poco, è disonesto anche <text:s/>nel molto. <text:s text:c="2"/></text:p>
      <text:p text:style-name="P739">16,11 <text:s/>Se dunque non siete stati fedeli nella iniqua ricchezza, chi vi affiderà quella vera? <text:s text:c="2"/></text:p>
      <text:p text:style-name="P740">16,12 <text:s/>E se non siete stati fedeli nella ricchezza altrui, chi vi darà la vostra? <text:s text:c="2"/></text:p>
      <text:p text:style-name="P741">16,13 <text:s/>Nessun servo può servire a due padroni: o odierà l'uno e amerà l'altro oppure si affezionerà <text:s/>all'uno e disprezzerà l'altro. Non potete servire a Dio e a mammona". <text:s text:c="2"/></text:p>
      <text:p text:style-name="P742">16,14 <text:s/>I farisei, che erano attaccati al denaro, ascoltavano tutte queste cose e si beffavano di lui. <text:s text:c="2"/></text:p>
      <text:p text:style-name="P743">16,15 <text:s/>Egli disse: "Voi vi ritenete giusti davanti agli uomini, ma Dio conosce i vostri cuori: ciò che è <text:s/>esaltato fra gli uomini è cosa detestabile davanti a Dio. <text:s text:c="2"/></text:p>
      <text:p text:style-name="P744">16,16 <text:s/>La Legge e i Profeti fino a Giovanni; da allora in poi viene annunziato il regno di Dio e ognuno <text:s/>si sforza per entrarvi. <text:s text:c="2"/></text:p>
      <text:soft-page-break/>
      <text:p text:style-name="P745">16,17 <text:s/>È più facile che abbiano fine il cielo e la terra, anziché cada un solo trattino della Legge. <text:s text:c="2"/></text:p>
      <text:p text:style-name="P746">16,18 <text:s/>Chiunque ripudia la propria moglie e ne sposa un'altra, commette adulterio; chi sposa una donna <text:s/>ripudiata dal marito, commette adulterio. <text:s text:c="2"/></text:p>
      <text:p text:style-name="P747">16,19 <text:s/>C'era un uomo ricco, che vestiva di porpora e di bisso e tutti i giorni banchettava lautamente. <text:s text:c="2"/></text:p>
      <text:p text:style-name="P748">16,20 <text:s/>Un mendicante, di nome Lazzaro, giaceva alla sua porta, coperto di piaghe, <text:s text:c="2"/></text:p>
      <text:p text:style-name="P749">16,21 <text:s/>bramoso di sfamarsi di quello che cadeva dalla mensa del ricco. Perfino i cani venivano a leccare <text:s/>le sue piaghe. <text:s text:c="2"/></text:p>
      <text:p text:style-name="P750">16,22 <text:s/>Un giorno il povero morì e fu portato dagli angeli nel seno di Abramo. Morì anche il ricco e fu <text:s/>sepolto. <text:s text:c="2"/></text:p>
      <text:p text:style-name="P751">16,23 <text:s/>Stando nell'inferno tra i tormenti, levò gli occhi e vide di lontano Abramo e Lazzaro accanto a <text:s/>lui. <text:s text:c="2"/></text:p>
      <text:p text:style-name="P752">16,24 <text:s/>Allora gridando disse: Padre Abramo, abbi pietà di me e manda Lazzaro a intingere nell'acqua la <text:s/>punta del dito e bagnarmi la lingua, perché questa fiamma mi tortura. <text:s text:c="2"/></text:p>
      <text:p text:style-name="P753">16,25 <text:s/>Ma Abramo rispose: Figlio, ricordati che hai ricevuto i tuoi beni durante la vita e Lazzaro <text:s/>parimenti i suoi mali; ora invece lui è consolato e tu sei in mezzo ai tormenti. <text:s text:c="2"/></text:p>
      <text:p text:style-name="P754">16,26 <text:s/>Per di più, tra noi e voi è stabilito un grande abisso: coloro che di qui vogliono passare da voi <text:s/>non possono, né di costì si può attraversare fino a noi. <text:s text:c="2"/></text:p>
      <text:p text:style-name="P755">16,27 <text:s/>E quegli replicò: Allora, padre, ti prego di mandarlo a casa di mio padre, <text:s text:c="2"/></text:p>
      <text:p text:style-name="P756">16,28 <text:s/>perché ho cinque fratelli. Li ammonisca, perché non vengano anch'essi in questo luogo di <text:s/>tormento. <text:s text:c="2"/></text:p>
      <text:p text:style-name="P757">16,29 <text:s/>Ma Abramo rispose: Hanno Mosè e i Profeti; ascoltino loro. <text:s text:c="2"/></text:p>
      <text:p text:style-name="P758">16,30 <text:s/>E lui: No, padre Abramo, ma se qualcuno dai morti andrà da loro, si ravvederanno. <text:s text:c="2"/></text:p>
      <text:p text:style-name="P759">16,31 <text:s/>Abramo rispose: Se non ascoltano Mosè e i Profeti, neanche se uno risuscitasse dai morti <text:s/>sarebbero persuasi". <text:s text:c="2"/></text:p>
      <text:p text:style-name="P760">17,1 <text:s/>Disse ancora ai suoi discepoli: "È inevitabile che avvengano scandali, ma guai a colui per cui <text:s/>avvengono. <text:s text:c="2"/></text:p>
      <text:p text:style-name="P761">17,2 <text:s/>È meglio per lui che gli sia messa al collo una pietra da mulino e venga gettato nel mare, <text:s/>piuttosto che scandalizzare uno di questi piccoli. <text:s text:c="2"/></text:p>
      <text:p text:style-name="P762">17,3 <text:s/>State attenti a voi stessi! Se un tuo fratello pecca, rimproveralo; ma se si pente, perdonagli. <text:s text:c="2"/></text:p>
      <text:p text:style-name="P763">17,4 <text:s/>E se pecca sette volte al giorno contro di te e sette volte ti dice: Mi pento, tu gli <text:s/>perdonerai". <text:s text:c="2"/></text:p>
      <text:p text:style-name="P764">17,5 <text:s/>Gli apostoli dissero al Signore: <text:s text:c="2"/></text:p>
      <text:p text:style-name="P765">17,6 <text:s/>"Aumenta la nostra fede!". Il Signore rispose: "Se aveste fede quanto un granellino di senapa, <text:s/>potreste dire a questo gelso: Sii sradicato e trapiantato nel mare, ed esso vi ascolterebbe. <text:s text:c="2"/></text:p>
      <text:p text:style-name="P766">17,7 <text:s/>Chi di voi, se ha un servo ad arare o a pascolare il gregge, gli dirà quando rientra dal campo: <text:s/>Vieni subito e mettiti a tavola? <text:s text:c="2"/></text:p>
      <text:p text:style-name="P767">17,8 <text:s/>Non gli dirà piuttosto: Preparami da mangiare, rimboccati la veste e servimi, finché io abbia <text:s/>mangiato e bevuto, e dopo mangerai e berrai anche tu? <text:s text:c="2"/></text:p>
      <text:p text:style-name="P768">17,9 <text:s/>Si riterrà obbligato verso il suo servo, perché ha eseguito gli ordini ricevuti? <text:s text:c="2"/></text:p>
      <text:p text:style-name="P769">17,10 <text:s/>Così anche voi, quando avrete fatto tutto quello che vi è stato ordinato, dite: Siamo servi <text:s/>inutili. Abbiamo fatto quanto dovevamo fare". <text:s text:c="2"/></text:p>
      <text:p text:style-name="P770">17,11 <text:s/>Durante il viaggio verso Gerusalemme, Gesù attraversò la Samaria e la Galilea. <text:s text:c="2"/></text:p>
      <text:soft-page-break/>
      <text:p text:style-name="P771">17,12 <text:s/>Entrando in un villaggio, gli vennero incontro dieci lebbrosi i quali, fermatisi a distanza, <text:s text:c="2"/></text:p>
      <text:p text:style-name="P772">17,13 <text:s/>alzarono la voce, dicendo: "Gesù maestro, abbi pietà di noi!". <text:s text:c="2"/></text:p>
      <text:p text:style-name="P773">17,14 <text:s/>Appena li vide, Gesù disse: "Andate a presentarvi ai sacerdoti". E mentre essi andavano, furono <text:s/>sanati. <text:s text:c="2"/></text:p>
      <text:p text:style-name="P774">17,15 <text:s/>Uno di loro, vedendosi guarito, tornò indietro lodando Dio a gran voce; <text:s text:c="2"/></text:p>
      <text:p text:style-name="P775">17,16 <text:s/>e si gettò ai piedi di Gesù per ringraziarlo. Era un Samaritano. <text:s text:c="2"/></text:p>
      <text:p text:style-name="P776">17,17 <text:s/>Ma Gesù osservò: "Non sono stati guariti tutti e dieci? E gli altri nove dove sono? <text:s text:c="2"/></text:p>
      <text:p text:style-name="P777">17,18 <text:s/>Non si è trovato chi tornasse a render gloria a Dio, all'infuori di questo straniero?". E gli <text:s/>disse: <text:s text:c="2"/></text:p>
      <text:p text:style-name="P778">17,19 <text:s/>"Alzati e va'; la tua fede ti ha salvato!". <text:s text:c="2"/></text:p>
      <text:p text:style-name="P779">17,20 <text:s/>Interrogato dai farisei: "Quando verrà il regno di Dio?", rispose: <text:s text:c="2"/></text:p>
      <text:p text:style-name="P780">17,21 <text:s/>"Il regno di Dio non viene in modo da attirare l'attenzione, e nessuno dirà: Eccolo qui, o: <text:s/>eccolo là. Perché il regno di Dio è in mezzo a voi!". <text:s text:c="2"/></text:p>
      <text:p text:style-name="P781">17,22 <text:s/>Disse ancora ai discepoli: "Verrà un tempo in cui desidererete vedere anche uno solo dei giorni <text:s/>del Figlio dell'uomo, ma non lo vedrete. <text:s text:c="2"/></text:p>
      <text:p text:style-name="P782">17,23 <text:s/>Vi diranno: Eccolo là, o: eccolo qua; non andateci, non seguiteli. <text:s text:c="2"/></text:p>
      <text:p text:style-name="P783">17,24 <text:s/>Perché come il lampo, guizzando, brilla da un capo all'altro del cielo, così sarà il Figlio <text:s/>dell'uomo nel suo giorno. <text:s text:c="2"/></text:p>
      <text:p text:style-name="P784">17,25 <text:s/>Ma prima è necessario che egli soffra molto e venga ripudiato da questa generazione. <text:s text:c="2"/></text:p>
      <text:p text:style-name="P785">17,26 <text:s/>Come avvenne al tempo di Noè, così sarà nei giorni del Figlio dell'uomo: <text:s text:c="2"/></text:p>
      <text:p text:style-name="P786">17,27 <text:s/>mangiavano, bevevano, si ammogliavano e si maritavano, fino al giorno in cui Noè entrò nell'arca <text:s/>e venne il diluvio e li fece perire tutti. <text:s text:c="2"/></text:p>
      <text:p text:style-name="P787">17,28 <text:s/>Come avvenne anche al tempo di Lot: mangiavano, bevevano, compravano, vendevano, piantavano, <text:s/>costruivano; <text:s text:c="2"/></text:p>
      <text:p text:style-name="P788">17,29 <text:s/>ma nel giorno in cui Lot uscì da Sòdoma piovve fuoco e zolfo dal cielo e li fece perire tutti. <text:s text:c="2"/></text:p>
      <text:p text:style-name="P789">17,30 <text:s/>Così sarà nel giorno in cui il Figlio dell'uomo si rivelerà. <text:s text:c="2"/></text:p>
      <text:p text:style-name="P790">17,31 <text:s/>In quel giorno, chi si troverà sulla terrazza, se le sue cose sono in casa, non scenda a <text:s/>prenderle; così chi si troverà nel campo, non torni indietro. <text:s text:c="2"/></text:p>
      <text:p text:style-name="P791">17,32 <text:s/>Ricordatevi della moglie di Lot. <text:s text:c="2"/></text:p>
      <text:p text:style-name="P792">17,33 <text:s/>Chi cercherà di salvare la propria vita la perderà, chi invece l'avrà perduta la salverà. <text:s text:c="2"/></text:p>
      <text:p text:style-name="P793">17,34 <text:s/>Vi dico: in quella notte due si troveranno in un solo letto: l'uno verrà preso e l'altro <text:s/>lasciato; <text:s text:c="2"/></text:p>
      <text:p text:style-name="P794">17,35 <text:s/>due donne staranno a macinare nello stesso luogo: l'una verrà presa e l'altra lasciata". <text:s text:c="2"/></text:p>
      <text:p text:style-name="P795">17,36 <text:s/>[] <text:s text:c="2"/></text:p>
      <text:p text:style-name="P796">17,37 <text:s/>Allora i discepoli gli chiesero: "Dove, Signore?". Ed egli disse loro: "Dove sarà il cadavere, là <text:s/>si raduneranno anche gli avvoltoi". <text:s text:c="2"/></text:p>
      <text:p text:style-name="P797">18,1 <text:s/>Disse loro una parabola sulla necessità di pregare sempre, senza stancarsi: <text:s text:c="2"/></text:p>
      <text:p text:style-name="P798">18,2 <text:s/>"C'era in una città un giudice, che non temeva Dio e non aveva riguardo per nessuno. <text:s text:c="2"/></text:p>
      <text:soft-page-break/>
      <text:p text:style-name="P799">18,3 <text:s/>In quella città c'era anche una vedova, che andava da lui e gli diceva: Fammi giustizia contro il <text:s/>mio avversario. <text:s text:c="2"/></text:p>
      <text:p text:style-name="P800">18,4 <text:s/>Per un certo tempo egli non volle; ma poi disse tra sé: Anche se non temo Dio e non ho rispetto <text:s/>di nessuno, <text:s text:c="2"/></text:p>
      <text:p text:style-name="P801">18,5 <text:s/>poiché questa vedova è così molesta le farò giustizia, perché non venga continuamente a <text:s/>importunarmi". <text:s text:c="2"/></text:p>
      <text:p text:style-name="P802">18,6 <text:s/>E il Signore soggiunse: "Avete udito ciò che dice il giudice disonesto. <text:s text:c="2"/></text:p>
      <text:p text:style-name="P803">18,7 <text:s/>E Dio non farà giustizia ai suoi eletti che gridano giorno e notte verso di lui? Li farà a lungo <text:s/>aspettare? <text:s text:c="2"/></text:p>
      <text:p text:style-name="P804">18,8 <text:s/>Vi dico che farà loro giustizia prontamente. Ma il Figlio dell'uomo, quando verrà, troverà la <text:s/>fede sulla terra?". <text:s text:c="2"/></text:p>
      <text:p text:style-name="P805">18,9 <text:s/>Disse ancora questa parabola per alcuni che presumevano di esser giusti e disprezzavano gli <text:s/>altri: <text:s text:c="2"/></text:p>
      <text:p text:style-name="P806">18,10 <text:s/>"Due uomini salirono al tempio a pregare: uno era fariseo e l'altro pubblicano. <text:s text:c="2"/></text:p>
      <text:p text:style-name="P807">18,11 <text:s/>Il fariseo, stando in piedi, pregava così tra sé: O Dio, ti ringrazio che non sono come gli altri <text:s/>uomini, ladri, ingiusti, adùlteri, e neppure come questo pubblicano. <text:s text:c="2"/></text:p>
      <text:p text:style-name="P808">18,12 <text:s/>Digiuno due volte la settimana e pago le decime di quanto possiedo. <text:s text:c="2"/></text:p>
      <text:p text:style-name="P809">18,13 <text:s/>Il pubblicano invece, fermatosi a distanza, non osava nemmeno alzare gli occhi al cielo, ma si <text:s/>batteva il petto dicendo: O Dio, abbi pietà di me peccatore. <text:s text:c="2"/></text:p>
      <text:p text:style-name="P810">18,14 <text:s/>Io vi dico: questi tornò a casa sua giustificato, a differenza dell'altro, perché chi si esalta <text:s/>sarà umiliato e chi si umilia sarà esaltato". <text:s text:c="2"/></text:p>
      <text:p text:style-name="P811">18,15 <text:s/>Gli presentavano anche i bambini perché li accarezzasse, ma i discepoli, vedendo ciò, li <text:s/>rimproveravano. <text:s text:c="2"/></text:p>
      <text:p text:style-name="P812">18,16 <text:s/>Allora Gesù li fece venire avanti e disse: "Lasciate che i bambini vengano a me, non glielo <text:s/>impedite perché a chi è come loro appartiene il regno di Dio. <text:s text:c="2"/></text:p>
      <text:p text:style-name="P813">18,17 <text:s/>In verità vi dico: Chi non accoglie il regno di Dio come un bambino, non vi entrerà". <text:s text:c="2"/></text:p>
      <text:p text:style-name="P814">18,18 <text:s/>Un notabile lo interrogò: "Maestro buono, che devo fare per ottenere la vita eterna?". <text:s text:c="2"/></text:p>
      <text:p text:style-name="P815">18,19 <text:s/>Gesù gli rispose: "Perché mi dici buono? Nessuno è buono, se non uno solo, Dio. <text:s text:c="2"/></text:p>
      <text:p text:style-name="P816">18,20 <text:s/>Tu conosci i comandamenti: Non commettere adulterio, non uccidere, non rubare, non testimoniare <text:s/>il falso, onora tuo padre e tua madre". <text:s text:c="2"/></text:p>
      <text:p text:style-name="P817">18,21 <text:s/>Costui disse: "Tutto questo l'ho osservato fin dalla mia giovinezza". <text:s text:c="2"/></text:p>
      <text:p text:style-name="P818">18,22 <text:s/>Udito ciò, Gesù gli disse: "Una cosa ancora ti manca: vendi tutto quello che hai, distribuiscilo <text:s/>ai poveri e avrai un tesoro nei cieli; poi vieni e seguimi". <text:s text:c="2"/></text:p>
      <text:p text:style-name="P819">18,23 <text:s/>Ma quegli, udite queste parole, divenne assai triste, perché era molto ricco. <text:s text:c="2"/></text:p>
      <text:p text:style-name="P820">18,24 <text:s/>Quando Gesù lo vide, disse: "Quant'è difficile, per coloro che possiedono ricchezze entrare nel <text:s/>regno di Dio. <text:s text:c="2"/></text:p>
      <text:p text:style-name="P821">18,25 <text:s/>È più facile per un cammello passare per la cruna di un ago che per un ricco entrare nel regno di <text:s/>Dio!". <text:s text:c="2"/></text:p>
      <text:p text:style-name="P822">18,26 <text:s/>Quelli che ascoltavano dissero: "Allora chi potrà essere salvato?". <text:s text:c="2"/></text:p>
      <text:p text:style-name="P823">18,27 <text:s/>Rispose: "Ciò che è impossibile agli uomini, è possibile a Dio". <text:s text:c="2"/></text:p>
      <text:p text:style-name="P824">18,28 <text:s/>Pietro allora disse: "Noi abbiamo lasciato tutte le nostre cose e ti abbiamo seguito". <text:s text:c="2"/></text:p>
      <text:p text:style-name="P825">18,29 <text:s/>Ed egli rispose: "In verità vi dico, non c'è nessuno che abbia lasciato casa o moglie o fratelli <text:s/>o genitori o figli per il regno di Dio, <text:s text:c="2"/></text:p>
      <text:soft-page-break/>
      <text:p text:style-name="P826">18,30 <text:s/>che non riceva molto di più nel tempo presente e la vita eterna nel tempo che verrà". <text:s text:c="2"/></text:p>
      <text:p text:style-name="P827">18,31 <text:s/>Poi prese con sé i Dodici e disse loro: "Ecco, noi andiamo a Gerusalemme, e tutto ciò che fu <text:s/>scritto dai profeti riguardo al Figlio dell'uomo si compirà. <text:s text:c="2"/></text:p>
      <text:p text:style-name="P828">18,32 <text:s/>Sarà consegnato ai pagani, schernito, oltraggiato, coperto di sputi <text:s text:c="2"/></text:p>
      <text:p text:style-name="P829">18,33 <text:s/>e, dopo averlo flagellato, lo uccideranno e il terzo giorno risorgerà". <text:s text:c="2"/></text:p>
      <text:p text:style-name="P830">18,34 <text:s/>Ma non compresero nulla di tutto questo; quel parlare restava oscuro per loro e non capivano ciò <text:s/>che egli aveva detto. <text:s text:c="2"/></text:p>
      <text:p text:style-name="P831">18,35 <text:s/>Mentre si avvicinava a Gerico, un cieco era seduto a mendicare lungo la strada. <text:s text:c="2"/></text:p>
      <text:p text:style-name="P832">18,36 <text:s/>Sentendo passare la gente, domandò che cosa accadesse. <text:s text:c="2"/></text:p>
      <text:p text:style-name="P833">18,37 <text:s/>Gli risposero: "Passa Gesù il Nazareno!". <text:s text:c="2"/></text:p>
      <text:p text:style-name="P834">18,38 <text:s/>Allora incominciò a gridare: "Gesù, figlio di Davide, abbi pietà di me!". <text:s text:c="2"/></text:p>
      <text:p text:style-name="P835">18,39 <text:s/>Quelli che camminavano avanti lo sgridavano, perché tacesse; ma lui continuava ancora più forte: <text:s/>"Figlio di Davide, abbi pietà di me!". <text:s text:c="2"/></text:p>
      <text:p text:style-name="P836">18,40 <text:s/>Gesù allora si fermò e ordinò che glielo conducessero. Quando gli fu vicino, gli domandò: <text:s text:c="2"/></text:p>
      <text:p text:style-name="P837">18,41 <text:s/>"Che vuoi che io faccia per te?". Egli rispose: "Signore, che io riabbia la vista". <text:s text:c="2"/></text:p>
      <text:p text:style-name="P838">18,42 <text:s/>E Gesù gli disse: "Abbi di nuovo la vista! La tua fede ti ha salvato". <text:s text:c="2"/></text:p>
      <text:p text:style-name="P839">18,43 <text:s/>Subito ci vide di nuovo e cominciò a seguirlo lodando Dio. E tutto il popolo, alla vista di ciò, <text:s/>diede lode a Dio. <text:s text:c="2"/></text:p>
      <text:p text:style-name="P840">19,1 <text:s/>Entrato in Gerico, attraversava la città. <text:s text:c="2"/></text:p>
      <text:p text:style-name="P841">19,2 <text:s/>Ed ecco un uomo di nome Zaccheo, capo dei pubblicani e ricco, <text:s text:c="2"/></text:p>
      <text:p text:style-name="P842">19,3 <text:s/>cercava di vedere quale fosse Gesù, ma non gli riusciva a causa della folla, poiché era piccolo <text:s/>di statura. <text:s text:c="2"/></text:p>
      <text:p text:style-name="P843">19,4 <text:s/>Allora corse avanti e, per poterlo vedere, salì su un sicomoro, poiché doveva passare di là. <text:s text:c="2"/></text:p>
      <text:p text:style-name="P844">19,5 <text:s/>Quando giunse sul luogo, Gesù alzò lo sguardo e gli disse: "Zaccheo, scendi subito, perché oggi <text:s/>devo fermarmi a casa tua". <text:s text:c="2"/></text:p>
      <text:p text:style-name="P845">19,6 <text:s/>In fretta scese e lo accolse pieno di gioia. <text:s text:c="2"/></text:p>
      <text:p text:style-name="P846">19,7 <text:s/>Vedendo ciò, tutti mormoravano: "È andato ad alloggiare da un peccatore!". <text:s text:c="2"/></text:p>
      <text:p text:style-name="P847">19,8 <text:s/>Ma Zaccheo, alzatosi, disse al Signore: "Ecco, Signore, io do la metà dei miei beni ai poveri; e <text:s/>se ho frodato qualcuno, restituisco quattro volte tanto". <text:s text:c="2"/></text:p>
      <text:p text:style-name="P848">19,9 <text:s/>Gesù gli rispose: "Oggi la salvezza è entrata in questa casa, perché anch'egli è figlio di <text:s/>Abramo; <text:s text:c="2"/></text:p>
      <text:p text:style-name="P849">19,10 <text:s/>il Figlio dell'uomo infatti è venuto a cercare e a salvare ciò che era perduto". <text:s text:c="2"/></text:p>
      <text:p text:style-name="P850">19,11 <text:s/>Mentre essi stavano ad ascoltare queste cose, Gesù disse ancora una parabola perché era vicino a <text:s/>Gerusalemme ed essi credevano che il regno di Dio dovesse manifestarsi da un momento all'altro. <text:s text:c="2"/></text:p>
      <text:p text:style-name="P851">19,12 <text:s/>Disse dunque: "Un uomo di nobile stirpe partì per un paese lontano per ricevere un titolo regale <text:s/>e poi ritornare. <text:s text:c="2"/></text:p>
      <text:p text:style-name="P852">19,13 <text:s/>Chiamati dieci servi, consegnò loro dieci mine, dicendo: Impiegatele fino al mio ritorno. <text:s text:c="2"/></text:p>
      <text:p text:style-name="P853">19,14 <text:s/>Ma i suoi cittadini lo odiavano e gli mandarono dietro un'ambasceria a dire: Non vogliamo che <text:s/>costui venga a regnare su di noi. <text:s text:c="2"/></text:p>
      <text:soft-page-break/>
      <text:p text:style-name="P854">19,15 <text:s/>Quando fu di ritorno, dopo aver ottenuto il titolo di re, fece chiamare i servi ai quali aveva <text:s/>consegnato il denaro, per vedere quanto ciascuno avesse guadagnato. <text:s text:c="2"/></text:p>
      <text:p text:style-name="P855">19,16 <text:s/>Si presentò il primo e disse: Signore, la tua mina ha fruttato altre dieci mine. <text:s text:c="2"/></text:p>
      <text:p text:style-name="P856">19,17 <text:s/>Gli disse: Bene, bravo servitore; poiché ti sei mostrato fedele nel poco, ricevi il potere sopra <text:s/>dieci città. <text:s text:c="2"/></text:p>
      <text:p text:style-name="P857">19,18 <text:s/>Poi si presentò il secondo e disse: La tua mina, signore, ha fruttato altre cinque mine. <text:s text:c="2"/></text:p>
      <text:p text:style-name="P858">19,19 <text:s/>Anche a questo disse: Sarai tu pure a capo di cinque città. <text:s text:c="2"/></text:p>
      <text:p text:style-name="P859">19,20 <text:s/>Venne poi anche l'altro e disse: Signore, ecco la tua mina, che ho tenuta riposta in un <text:s/>fazzoletto; <text:s text:c="2"/></text:p>
      <text:p text:style-name="P860">19,21 <text:s/>avevo paura di te che sei un uomo severo e prendi quello che non hai messo in deposito, mieti <text:s/>quello che non hai seminato. <text:s text:c="2"/></text:p>
      <text:p text:style-name="P861">19,22 <text:s/>Gli rispose: Dalle tue stesse parole ti giudico, servo malvagio! Sapevi che sono un uomo severo, <text:s/>che prendo quello che non ho messo in deposito e mieto quello che non ho seminato: <text:s text:c="2"/></text:p>
      <text:p text:style-name="P862">19,23 <text:s/>perché allora non hai consegnato il mio denaro a una banca? Al mio ritorno l'avrei riscosso con <text:s/>gli interessi. <text:s text:c="2"/></text:p>
      <text:p text:style-name="P863">19,24 <text:s/>Disse poi ai presenti: Toglietegli la mina e datela a colui che ne ha dieci <text:s text:c="2"/></text:p>
      <text:p text:style-name="P864">19,25 <text:s/>Gli risposero: Signore, ha già dieci mine! <text:s text:c="2"/></text:p>
      <text:p text:style-name="P865">19,26 <text:s/>Vi dico: A chiunque ha sarà dato; ma a chi non ha sarà tolto anche quello che ha. <text:s text:c="2"/></text:p>
      <text:p text:style-name="P866">19,27 <text:s/>E quei miei nemici che non volevano che diventassi loro re, conduceteli qui e uccideteli davanti <text:s/>a me". <text:s text:c="2"/></text:p>
      <text:p text:style-name="P867">19,28 <text:s/>Dette queste cose, Gesù proseguì avanti agli altri salendo verso Gerusalemme. <text:s text:c="2"/></text:p>
      <text:p text:style-name="P868">19,29 <text:s/>Quando fu vicino a Bètfage e a Betània, presso il monte detto degli Ulivi, inviò due discepoli <text:s/>dicendo: <text:s text:c="2"/></text:p>
      <text:p text:style-name="P869">19,30 <text:s/>"Andate nel villaggio di fronte; entrando, troverete un puledro legato, sul quale nessuno è mai <text:s/>salito; scioglietelo e portatelo qui. <text:s text:c="2"/></text:p>
      <text:p text:style-name="P870">19,31 <text:s/>E se qualcuno vi chiederà: Perché lo sciogliete?, direte così: Il Signore ne ha bisogno". <text:s text:c="2"/></text:p>
      <text:p text:style-name="P871">19,32 <text:s/>Gli inviati andarono e trovarono tutto come aveva detto. <text:s text:c="2"/></text:p>
      <text:p text:style-name="P872">19,33 <text:s/>Mentre scioglievano il puledro, i proprietari dissero loro: "Perché sciogliete il puledro?". <text:s text:c="2"/></text:p>
      <text:p text:style-name="P873">19,34 <text:s/>Essi risposero: "Il Signore ne ha bisogno". <text:s text:c="2"/></text:p>
      <text:p text:style-name="P874">19,35 <text:s/>Lo condussero allora da Gesù; e gettati i loro mantelli sul puledro, vi fecero salire Gesù. <text:s text:c="2"/></text:p>
      <text:p text:style-name="P875">19,36 <text:s/>Via via che egli avanzava, stendevano i loro mantelli sulla strada. <text:s text:c="2"/></text:p>
      <text:p text:style-name="P876">19,37 <text:s/>Era ormai vicino alla discesa del monte degli Ulivi, quando tutta la folla dei discepoli, <text:s/>esultando, cominciò a lodare Dio a gran voce, per tutti i prodigi che avevano veduto, dicendo: <text:s text:c="2"/></text:p>
      <text:p text:style-name="P877">19,38 <text:s/>"Benedetto colui che viene, il re, nel nome del Signore. Pace in cielo e gloria nel più alto dei <text:s/>cieli!". <text:s text:c="2"/></text:p>
      <text:p text:style-name="P878">19,39 <text:s/>Alcuni farisei tra la folla gli dissero: "Maestro, rimprovera i tuoi discepoli". <text:s text:c="2"/></text:p>
      <text:p text:style-name="P879">19,40 <text:s/>Ma egli rispose: "Vi dico che, se questi taceranno, grideranno le pietre". <text:s text:c="2"/></text:p>
      <text:p text:style-name="P880">19,41 <text:s/>Quando fu vicino, alla vista della città, pianse su di essa, dicendo: <text:s text:c="2"/></text:p>
      <text:soft-page-break/>
      <text:p text:style-name="P881">19,42 <text:s/>"Se avessi compreso anche tu, in questo giorno, la via della pace. Ma ormai è stata nascosta ai <text:s/>tuoi occhi. <text:s text:c="2"/></text:p>
      <text:p text:style-name="P882">19,43 <text:s/>Giorni verranno per te in cui i tuoi nemici ti cingeranno di trincee, ti circonderanno e ti <text:s/>stringeranno da ogni parte; <text:s text:c="2"/></text:p>
      <text:p text:style-name="P883">19,44 <text:s/>abbatteranno te e i tuoi figli dentro di te e non lasceranno in te pietra su pietra, perché non <text:s/>hai riconosciuto il tempo in cui sei stata visitata". <text:s text:c="2"/></text:p>
      <text:p text:style-name="P884">19,45 <text:s/>Entrato poi nel tempio, cominciò a cacciare i venditori, <text:s text:c="2"/></text:p>
      <text:p text:style-name="P885">19,46 <text:s/>dicendo: "Sta scritto: La mia casa sarà casa di preghiera. Ma voi ne avete fatto una spelonca di <text:s/>ladri!". <text:s text:c="2"/></text:p>
      <text:p text:style-name="P886">19,47 <text:s/>Ogni giorno insegnava nel tempio. I sommi sacerdoti e gli scribi cercavano di farlo perire e così <text:s/>anche i notabili del popolo; <text:s text:c="2"/></text:p>
      <text:p text:style-name="P887">19,48 <text:s/>ma non sapevano come fare, perché tutto il popolo pendeva dalle sue parole. <text:s text:c="2"/></text:p>
      <text:p text:style-name="P888">20,1 <text:s/>Un giorno, mentre istruiva il popolo nel tempio e annunziava la parola di Dio, si avvicinarono i <text:s/>sommi sacerdoti e gli scribi con gli anziani e si rivolsero a lui dicendo: <text:s text:c="2"/></text:p>
      <text:p text:style-name="P889">20,2 <text:s/>"Dicci con quale autorità fai queste cose o chi è che t'ha dato quest'autorità". <text:s text:c="2"/></text:p>
      <text:p text:style-name="P890">20,3 <text:s/>E Gesù disse loro: "Vi farò anch'io una domanda e voi rispondetemi: <text:s text:c="2"/></text:p>
      <text:p text:style-name="P891">20,4 <text:s/>Il battesimo di Giovanni veniva dal Cielo o dagli uomini?". <text:s text:c="2"/></text:p>
      <text:p text:style-name="P892">20,5 <text:s/>Allora essi discutevano fra loro: "Se diciamo "dal Cielo", risponderà: "Perché non gli avete <text:s/>creduto?". <text:s text:c="2"/></text:p>
      <text:p text:style-name="P893">20,6 <text:s/>E se diciamo "dagli uomini", tutto il popolo ci lapiderà, perché è convinto che Giovanni è un <text:s/>profeta". <text:s text:c="2"/></text:p>
      <text:p text:style-name="P894">20,7 <text:s/>Risposero quindi di non saperlo. <text:s text:c="2"/></text:p>
      <text:p text:style-name="P895">20,8 <text:s/>E Gesù disse loro: "Nemmeno io vi dico con quale autorità faccio queste cose". <text:s text:c="2"/></text:p>
      <text:p text:style-name="P896">20,9 <text:s/>Poi cominciò a dire al popolo questa parabola: "Un uomo piantò una vigna, l'affidò a dei <text:s/>coltivatori e se ne andò lontano per molto tempo. <text:s text:c="2"/></text:p>
      <text:p text:style-name="P897">20,10 <text:s/>A suo tempo, mandò un servo da quei coltivatori perché gli dessero una parte del raccolto della <text:s/>vigna. Ma i coltivatori lo percossero e lo rimandarono a mani vuote. <text:s text:c="2"/></text:p>
      <text:p text:style-name="P898">20,11 <text:s/>Mandò un altro servo, ma essi percossero anche questo, lo insultarono e lo rimandarono a mani <text:s/>vuote. <text:s text:c="2"/></text:p>
      <text:p text:style-name="P899">20,12 <text:s/>Ne mandò ancora un terzo, ma anche questo lo ferirono e lo cacciarono. <text:s text:c="2"/></text:p>
      <text:p text:style-name="P900">20,13 <text:s/>Disse allora il padrone della vigna: Che devo fare? Manderò il mio unico figlio; forse di lui <text:s/>avranno rispetto. <text:s text:c="2"/></text:p>
      <text:p text:style-name="P901">20,14 <text:s/>Quando lo videro, i coltivatori discutevano fra loro dicendo: Costui è l'erede. Uccidiamolo e <text:s/>così l'eredità sarà nostra. <text:s text:c="2"/></text:p>
      <text:p text:style-name="P902">20,15 <text:s/>E lo cacciarono fuori della vigna e l'uccisero. Che cosa farà dunque a costoro il padrone della <text:s/>vigna? <text:s text:c="2"/></text:p>
      <text:p text:style-name="P903">20,16 <text:s/>Verrà e manderà a morte quei coltivatori, e affiderà ad altri la vigna". Ma essi, udito ciò, <text:s/>esclamarono: "Non sia mai!". <text:s text:c="2"/></text:p>
      <text:p text:style-name="P904">20,17 <text:s/>Allora egli si volse verso di loro e disse: "Che cos'è dunque ciò che è scritto: La pietra che i <text:s/>costruttori hanno scartata, è diventata testata d'angolo? <text:s text:c="2"/></text:p>
      <text:p text:style-name="P905">20,18 <text:s/>Chiunque cadrà su quella pietra si sfracellerà e a chi cadrà addosso, lo stritolerà". <text:s text:c="2"/></text:p>
      <text:p text:style-name="P906">20,19 <text:s/>Gli scribi e i sommi sacerdoti cercarono allora di mettergli addosso le mani, ma ebbero paura del <text:s/>popolo. Avevano capito che quella parabola l'aveva detta per loro. <text:s text:c="2"/></text:p>
      <text:soft-page-break/>
      <text:p text:style-name="P907">20,20 <text:s/>Postisi in osservazione, mandarono informatori, che si fingessero persone oneste, per coglierlo <text:s/>in fallo nelle sue parole e poi consegnarlo all'autorità e al potere del governatore. <text:s text:c="2"/></text:p>
      <text:p text:style-name="P908">20,21 <text:s/>Costoro lo interrogarono: "Maestro, sappiamo che parli e insegni con rettitudine e non guardi in <text:s/>faccia a nessuno, ma insegni secondo verità la via di Dio. <text:s text:c="2"/></text:p>
      <text:p text:style-name="P909">20,22 <text:s/>È lecito che noi paghiamo il tributo a Cesare?". <text:s text:c="2"/></text:p>
      <text:p text:style-name="P910">20,23 <text:s/>Conoscendo la loro malizia, disse: <text:s text:c="2"/></text:p>
      <text:p text:style-name="P911">20,24 <text:s/>"Mostratemi un denaro: di chi è l'immagine e l'iscrizione?". Risposero: "Di Cesare". <text:s text:c="2"/></text:p>
      <text:p text:style-name="P912">20,25 <text:s/>Ed egli disse: "Rendete dunque a Cesare ciò che è di Cesare e a Dio ciò che è di Dio". <text:s text:c="2"/></text:p>
      <text:p text:style-name="P913">20,26 <text:s/>Così non poterono coglierlo in fallo davanti al popolo e, meravigliati della sua risposta, <text:s/>tacquero. <text:s text:c="2"/></text:p>
      <text:p text:style-name="P914">20,27 <text:s/>Gli si avvicinarono poi alcuni sadducei, i quali negano che vi sia la risurrezione, e gli posero <text:s/>questa domanda: <text:s text:c="2"/></text:p>
      <text:p text:style-name="P915">20,28 <text:s/>"Maestro, Mosè ci ha prescritto: Se a qualcuno muore un fratello che ha moglie, ma senza figli, <text:s/>suo fratello si prenda la vedova e dia una discendenza al proprio fratello. <text:s text:c="2"/></text:p>
      <text:p text:style-name="P916">20,29 <text:s/>C'erano dunque sette fratelli: il primo, dopo aver preso moglie, morì senza figli. <text:s text:c="2"/></text:p>
      <text:p text:style-name="P917">20,30 <text:s/>Allora la prese il secondo <text:s text:c="2"/></text:p>
      <text:p text:style-name="P918">20,31 <text:s/>e poi il terzo e così tutti e sette; e morirono tutti senza lasciare figli. <text:s text:c="2"/></text:p>
      <text:p text:style-name="P919">20,32 <text:s/>Da ultimo anche la donna morì. <text:s text:c="2"/></text:p>
      <text:p text:style-name="P920">20,33 <text:s/>Questa donna dunque, nella risurrezione, di chi sarà moglie? Poiché tutti e sette l'hanno avuta <text:s/>in moglie". <text:s text:c="2"/></text:p>
      <text:p text:style-name="P921">20,34 <text:s/>Gesù rispose: "I figli di questo mondo prendono moglie e prendono marito; <text:s text:c="2"/></text:p>
      <text:p text:style-name="P922">20,35 <text:s/>ma quelli che sono giudicati degni dell'altro mondo e della risurrezione dai morti, non prendono <text:s/>moglie né marito; <text:s text:c="2"/></text:p>
      <text:p text:style-name="P923">20,36 <text:s/>e nemmeno possono più morire, perché sono uguali agli angeli e, essendo figli della risurrezione, <text:s/>sono figli di Dio. <text:s text:c="2"/></text:p>
      <text:p text:style-name="P924">20,37 <text:s/>Che poi i morti risorgono, lo ha indicato anche Mosè a proposito del roveto, quando chiama il <text:s/>Signore: Dio di Abramo, Dio di Isacco e Dio di Giacobbe. <text:s text:c="2"/></text:p>
      <text:p text:style-name="P925">20,38 <text:s/>Dio non è Dio dei morti, ma dei vivi; perché tutti vivono per lui". <text:s text:c="2"/></text:p>
      <text:p text:style-name="P926">20,39 <text:s/>Dissero allora alcuni scribi: "Maestro, hai parlato bene". <text:s text:c="2"/></text:p>
      <text:p text:style-name="P927">20,40 <text:s/>E non osavano più fargli alcuna domanda. <text:s text:c="2"/></text:p>
      <text:p text:style-name="P928">20,41 <text:s/>Egli poi disse loro: "Come mai dicono che il Cristo è figlio di Davide, <text:s text:c="2"/></text:p>
      <text:p text:style-name="P929">20,42 <text:s/>se Davide stesso nel libro dei Salmi dice: Ha detto il Signore al mio Signore: siedi alla mia <text:s/>destra, <text:s text:c="2"/></text:p>
      <text:p text:style-name="P930">20,43 <text:s/>finché io ponga i tuoi nemici come sgabello ai tuoi piedi? <text:s text:c="2"/></text:p>
      <text:p text:style-name="P931">20,44 <text:s/>Davide dunque lo chiama Signore; perciò come può essere suo figlio?". <text:s text:c="2"/></text:p>
      <text:p text:style-name="P932">20,45 <text:s/>E mentre tutto il popolo ascoltava, disse ai discepoli: <text:s text:c="2"/></text:p>
      <text:p text:style-name="P933">20,46 <text:s/>"Guardatevi dagli scribi che amano passeggiare in lunghe vesti e hanno piacere di esser salutati <text:s/>nelle piazze, avere i primi seggi nelle sinagoghe e i primi posti nei conviti; <text:s text:c="2"/></text:p>
      <text:p text:style-name="P934">20,47 <text:s/>divorano le case delle vedove, e in apparenza fanno lunghe preghiere. Essi riceveranno una <text:s/>condanna più severa". <text:s text:c="2"/></text:p>
      <text:p text:style-name="P935">21,1 <text:s/>Alzati gli occhi, vide alcuni ricchi che gettavano le loro offerte nel tesoro. <text:s text:c="2"/></text:p>
      <text:soft-page-break/>
      <text:p text:style-name="P936">21,2 <text:s/>Vide anche una vedova povera che vi gettava due spiccioli <text:s text:c="2"/></text:p>
      <text:p text:style-name="P937">21,3 <text:s/>e disse: "In verità vi dico: questa vedova, povera, ha messo più di tutti. <text:s text:c="2"/></text:p>
      <text:p text:style-name="P938">21,4 <text:s/>Tutti costoro, infatti, han deposto come offerta del loro superfluo, questa invece nella sua <text:s/>miseria ha dato tutto quanto aveva per vivere". <text:s text:c="2"/></text:p>
      <text:p text:style-name="P939">21,5 <text:s/>Mentre alcuni parlavano del tempio e delle belle pietre e dei doni votivi che lo adornavano, <text:s/>disse: <text:s text:c="2"/></text:p>
      <text:p text:style-name="P940">21,6 <text:s/>"Verranno giorni in cui, di tutto quello che ammirate, non resterà pietra su pietra che non venga <text:s/>distrutta". <text:s text:c="2"/></text:p>
      <text:p text:style-name="P941">21,7 <text:s/>Gli domandarono: "Maestro, quando accadrà questo e quale sarà il segno che ciò sta per <text:s/>compiersi?". <text:s text:c="2"/></text:p>
      <text:p text:style-name="P942">21,8 <text:s/>Rispose: "Guardate di non lasciarvi ingannare. Molti verranno sotto il mio nome dicendo: "Sono <text:s/>io" e: "Il tempo è prossimo"; non seguiteli. <text:s text:c="2"/></text:p>
      <text:p text:style-name="P943">21,9 <text:s/>Quando sentirete parlare di guerre e di rivoluzioni, non vi terrorizzate. Devono infatti accadere <text:s/>prima queste cose, ma non sarà subito la fine". <text:s text:c="2"/></text:p>
      <text:p text:style-name="P944">21,10 <text:s/>Poi disse loro: "Si solleverà popolo contro popolo e regno contro regno, <text:s text:c="2"/></text:p>
      <text:p text:style-name="P945">21,11 <text:s/>e vi saranno di luogo in luogo terremoti, carestie e pestilenze; vi saranno anche fatti <text:s/>terrificanti e segni grandi dal cielo. <text:s text:c="2"/></text:p>
      <text:p text:style-name="P946">21,12 <text:s/>Ma prima di tutto questo metteranno le mani su di voi e vi perseguiteranno, consegnandovi alle <text:s/>sinagoghe e alle prigioni, trascinandovi davanti a re e a governatori, a causa del mio nome. <text:s text:c="2"/></text:p>
      <text:p text:style-name="P947">21,13 <text:s/>Questo vi darà occasione di render testimonianza. <text:s text:c="2"/></text:p>
      <text:p text:style-name="P948">21,14 <text:s/>Mettetevi bene in mente di non preparare prima la vostra difesa; <text:s text:c="2"/></text:p>
      <text:p text:style-name="P949">21,15 <text:s/>io vi darò lingua e sapienza, a cui tutti i vostri avversari non potranno resistere, né <text:s/>controbattere. <text:s text:c="2"/></text:p>
      <text:p text:style-name="P950">21,16 <text:s/>Sarete traditi perfino dai genitori, dai fratelli, dai parenti e dagli amici, e metteranno a <text:s/>morte alcuni di voi; <text:s text:c="2"/></text:p>
      <text:p text:style-name="P951">21,17 <text:s/>sarete odiati da tutti per causa del mio nome. <text:s text:c="2"/></text:p>
      <text:p text:style-name="P952">21,18 <text:s/>Ma nemmeno un capello del vostro capo perirà. <text:s text:c="2"/></text:p>
      <text:p text:style-name="P953">21,19 <text:s/>Con la vostra perseveranza salverete le vostre anime. <text:s text:c="2"/></text:p>
      <text:p text:style-name="P954">21,20 <text:s/>Ma quando vedrete Gerusalemme circondata da eserciti, sappiate allora che la sua devastazione è <text:s/>vicina. <text:s text:c="2"/></text:p>
      <text:p text:style-name="P955">21,21 <text:s/>Allora coloro che si trovano nella Giudea fuggano ai monti, coloro che sono dentro la città se ne <text:s/>allontanino, e quelli in campagna non tornino in città; <text:s text:c="2"/></text:p>
      <text:p text:style-name="P956">21,22 <text:s/>saranno infatti giorni di vendetta, perché tutto ciò che è stato scritto si compia. <text:s text:c="2"/></text:p>
      <text:p text:style-name="P957">21,23 <text:s/>Guai alle donne che sono incinte e allattano in quei giorni, perché vi sarà grande calamità nel <text:s/>paese e ira contro questo popolo. <text:s text:c="2"/></text:p>
      <text:p text:style-name="P958">21,24 <text:s/>Cadranno a fil di spada e saranno condotti prigionieri tra tutti i popoli; Gerusalemme sarà <text:s/>calpestata dai pagani finché i tempi dei pagani siano compiuti. <text:s text:c="2"/></text:p>
      <text:p text:style-name="P959">21,25 <text:s/>Vi saranno segni nel sole, nella luna e nelle stelle, e sulla terra angoscia di popoli in ansia <text:s/>per il fragore del mare e dei flutti, <text:s text:c="2"/></text:p>
      <text:p text:style-name="P960">21,26 <text:s/>mentre gli uomini moriranno per la paura e per l'attesa di ciò che dovrà accadere sulla terra. Le <text:s/>potenze dei cieli infatti saranno sconvolte. <text:s text:c="2"/></text:p>
      <text:p text:style-name="P961">21,27 <text:s/>Allora vedranno il Figlio dell'uomo venire su una nube con potenza e gloria grande. <text:s text:c="2"/></text:p>
      <text:soft-page-break/>
      <text:p text:style-name="P962">21,28 <text:s/>Quando cominceranno ad accadere queste cose, alzatevi e levate il capo, perché la vostra <text:s/>liberazione è vicina". <text:s text:c="2"/></text:p>
      <text:p text:style-name="P963">21,29 <text:s/>E disse loro una parabola: "Guardate il fico e tutte le piante; <text:s text:c="2"/></text:p>
      <text:p text:style-name="P964">21,30 <text:s/>quando già germogliano, guardandoli capite da voi stessi che ormai l'estate è vicina. <text:s text:c="2"/></text:p>
      <text:p text:style-name="P965">21,31 <text:s/>Così pure, quando voi vedrete accadere queste cose, sappiate che il regno di Dio è vicino. <text:s text:c="2"/></text:p>
      <text:p text:style-name="P966">21,32 <text:s/>In verità vi dico: non passerà questa generazione finché tutto ciò sia avvenuto. <text:s text:c="2"/></text:p>
      <text:p text:style-name="P967">21,33 <text:s/>Il cielo e la terra passeranno, ma le mie parole non passeranno. <text:s text:c="2"/></text:p>
      <text:p text:style-name="P968">21,34 <text:s/>State bene attenti che i vostri cuori non si appesantiscano in dissipazioni, ubriachezze e <text:s/>affanni della vita e che quel giorno non vi piombi addosso improvviso; <text:s text:c="2"/></text:p>
      <text:p text:style-name="P969">21,35 <text:s/>come un laccio esso si abbatterà sopra tutti coloro che abitano sulla faccia di tutta la terra. <text:s text:c="2"/></text:p>
      <text:p text:style-name="P970">21,36 <text:s/>Vegliate e pregate in ogni momento, perché abbiate la forza di sfuggire a tutto ciò che deve <text:s/>accadere, e di comparire davanti al Figlio dell'uomo". <text:s text:c="2"/></text:p>
      <text:p text:style-name="P971">21,37 <text:s/>Durante il giorno insegnava nel tempio, la notte usciva e pernottava all'aperto sul monte detto <text:s/>degli Ulivi. <text:s text:c="2"/></text:p>
      <text:p text:style-name="P972">21,38 <text:s/>E tutto il popolo veniva a lui di buon mattino nel tempio per ascoltarlo. <text:s text:c="2"/></text:p>
      <text:p text:style-name="P973">22,1 <text:s/>Si avvicinava la festa degli Azzimi, chiamata Pasqua, <text:s text:c="2"/></text:p>
      <text:p text:style-name="P974">22,2 <text:s/>e i sommi sacerdoti e gli scribi cercavano come toglierlo di mezzo, poiché temevano il popolo. <text:s text:c="2"/></text:p>
      <text:p text:style-name="P975">22,3 <text:s/>Allora satana entrò in Giuda, detto Iscariota, che era nel numero dei Dodici. <text:s text:c="2"/></text:p>
      <text:p text:style-name="P976">22,4 <text:s/>Ed egli andò a discutere con i sommi sacerdoti e i capi delle guardie sul modo di consegnarlo <text:s/>nelle loro mani. <text:s text:c="2"/></text:p>
      <text:p text:style-name="P977">22,5 <text:s/>Essi si rallegrarono e si accordarono di dargli del denaro. <text:s text:c="2"/></text:p>
      <text:p text:style-name="P978">22,6 <text:s/>Egli fu d'accordo e cercava l'occasione propizia per consegnarlo loro di nascosto dalla folla. <text:s text:c="2"/></text:p>
      <text:p text:style-name="P979">22,7 <text:s/>Venne il giorno degli Azzimi, nel quale si doveva immolare la vittima di Pasqua. <text:s text:c="2"/></text:p>
      <text:p text:style-name="P980">22,8 <text:s/>Gesù mandò Pietro e Giovanni dicendo: "Andate a preparare per noi la Pasqua, perché possiamo <text:s/>mangiare". <text:s text:c="2"/></text:p>
      <text:p text:style-name="P981">22,9 <text:s/>Gli chiesero: "Dove vuoi che la prepariamo?". <text:s text:c="2"/></text:p>
      <text:p text:style-name="P982">22,10 <text:s/>Ed egli rispose: "Appena entrati in città, vi verrà incontro un uomo che porta una brocca <text:s/>d'acqua. Seguitelo nella casa dove entrerà <text:s text:c="2"/></text:p>
      <text:p text:style-name="P983">22,11 <text:s/>e direte al padrone di casa: Il Maestro ti dice: Dov'è la stanza in cui posso mangiare la Pasqua <text:s/>con i miei discepoli? <text:s text:c="2"/></text:p>
      <text:p text:style-name="P984">22,12 <text:s/>Egli vi mostrerà una sala al piano superiore, grande e addobbata; là preparate". <text:s text:c="2"/></text:p>
      <text:p text:style-name="P985">22,13 <text:s/>Essi andarono e trovarono tutto come aveva loro detto e prepararono la Pasqua. <text:s text:c="2"/></text:p>
      <text:p text:style-name="P986">22,14 <text:s/>Quando fu l'ora, prese posto a tavola e gli apostoli con lui, <text:s text:c="2"/></text:p>
      <text:p text:style-name="P987">22,15 <text:s/>e disse: "Ho desiderato ardentemente di mangiare questa Pasqua con voi, prima della mia passione, <text:s text:c="2"/></text:p>
      <text:p text:style-name="P988">22,16 <text:s/>poiché vi dico: non la mangerò più, finché essa non si compia nel regno di Dio". <text:s text:c="2"/></text:p>
      <text:p text:style-name="P989">22,17 <text:s/>E preso un calice, rese grazie e disse: "Prendetelo e distribuitelo tra voi, <text:s text:c="2"/></text:p>
      <text:p text:style-name="P990">22,18 <text:s/>poiché vi dico: da questo momento non berrò più del frutto della vite, finché non venga il regno <text:s/>di Dio". <text:s text:c="2"/></text:p>
      <text:soft-page-break/>
      <text:p text:style-name="P991">22,19 <text:s/>Poi, preso un pane, rese grazie, lo spezzò e lo diede loro dicendo: "Questo è il mio corpo che è <text:s/>dato per voi; fate questo in memoria di me". <text:s text:c="2"/></text:p>
      <text:p text:style-name="P992">22,20 <text:s/>Allo stesso modo dopo aver cenato, prese il calice dicendo: "Questo calice è la nuova alleanza <text:s/>nel mio sangue, che viene versato per voi". <text:s text:c="2"/></text:p>
      <text:p text:style-name="P993">22,21 <text:s/>"Ma ecco, la mano di chi mi tradisce è con me, sulla tavola. <text:s text:c="2"/></text:p>
      <text:p text:style-name="P994">22,22 <text:s/>Il Figlio dell'uomo se ne va, secondo quanto è stabilito; ma guai a quell'uomo dal quale è <text:s/>tradito!". <text:s text:c="2"/></text:p>
      <text:p text:style-name="P995">22,23 <text:s/>Allora essi cominciarono a domandarsi a vicenda chi di essi avrebbe fatto ciò. <text:s text:c="2"/></text:p>
      <text:p text:style-name="P996">22,24 <text:s/>Sorse anche una discussione, chi di loro poteva esser considerato il più grande. <text:s text:c="2"/></text:p>
      <text:p text:style-name="P997">22,25 <text:s/>Egli disse: "I re delle nazioni le governano, e coloro che hanno il potere su di esse si fanno <text:s/>chiamare benefattori. <text:s text:c="2"/></text:p>
      <text:p text:style-name="P998">22,26 <text:s/>Per voi però non sia così; ma chi è il più grande tra voi diventi come il più piccolo e chi <text:s/>governa come colui che serve. <text:s text:c="2"/></text:p>
      <text:p text:style-name="P999">22,27 <text:s/>Infatti chi è più grande, chi sta a tavola o chi serve? Non è forse colui che sta a tavola? <text:s/>Eppure io sto in mezzo a voi come colui che serve. <text:s text:c="2"/></text:p>
      <text:p text:style-name="P1000">22,28 <text:s/>Voi siete quelli che avete perseverato con me nelle mie prove; <text:s text:c="2"/></text:p>
      <text:p text:style-name="P1001">22,29 <text:s/>e io preparo per voi un regno, come il Padre l'ha preparato per me, <text:s text:c="2"/></text:p>
      <text:p text:style-name="P1002">22,30 <text:s/>perché possiate mangiare e bere alla mia mensa nel mio regno e siederete in trono a giudicare le <text:s/>dodici tribù di Israele. <text:s text:c="2"/></text:p>
      <text:p text:style-name="P1003">22,31 <text:s/>Simone, Simone, ecco satana vi ha cercato per vagliarvi come il grano; <text:s text:c="2"/></text:p>
      <text:p text:style-name="P1004">22,32 <text:s/>ma io ho pregato per te, che non venga meno la tua fede; e tu, una volta ravveduto, conferma i <text:s/>tuoi fratelli". <text:s text:c="2"/></text:p>
      <text:p text:style-name="P1005">22,33 <text:s/>E Pietro gli disse: "Signore, con te sono pronto ad andare in prigione e alla morte". <text:s text:c="2"/></text:p>
      <text:p text:style-name="P1006">22,34 <text:s/>Gli rispose: "Pietro, io ti dico: non canterà oggi il gallo prima che tu per tre volte avrai <text:s/>negato di conoscermi". <text:s text:c="2"/></text:p>
      <text:p text:style-name="P1007">22,35 <text:s/>Poi disse: "Quando vi ho mandato senza borsa, né bisaccia, né sandali, vi è forse mancato <text:s/>qualcosa?". Risposero: "Nulla". <text:s text:c="2"/></text:p>
      <text:p text:style-name="P1008">22,36 <text:s/>Ed egli soggiunse: "Ma ora, chi ha una borsa la prenda, e così una bisaccia; chi non ha spada, <text:s/>venda il mantello e ne compri una. <text:s text:c="2"/></text:p>
      <text:p text:style-name="P1009">22,37 <text:s/>Perché vi dico: deve compiersi in me questa parola della Scrittura: E fu annoverato tra i <text:s/>malfattori. Infatti tutto quello che mi riguarda volge al suo termine". <text:s text:c="2"/></text:p>
      <text:p text:style-name="P1010">22,38 <text:s/>Ed essi dissero: "Signore, ecco qui due spade". Ma egli rispose "Basta!". <text:s text:c="2"/></text:p>
      <text:p text:style-name="P1011">22,39 <text:s/>Uscito se ne andò, come al solito, al monte degli Ulivi; anche i discepoli lo seguirono. <text:s text:c="2"/></text:p>
      <text:p text:style-name="P1012">22,40 <text:s/>Giunto sul luogo, disse loro: "Pregate, per non entrare in tentazione". <text:s text:c="2"/></text:p>
      <text:p text:style-name="P1013">22,41 <text:s/>Poi si allontanò da loro quasi un tiro di sasso e, inginocchiatosi, pregava: <text:s text:c="2"/></text:p>
      <text:p text:style-name="P1014">22,42 <text:s/>"Padre, se vuoi, allontana da me questo calice! Tuttavia non sia fatta la mia, ma la tua <text:s/>volontà". <text:s text:c="2"/></text:p>
      <text:p text:style-name="P1015">22,43 <text:s/>Gli apparve allora un angelo dal cielo a confortarlo. <text:s text:c="2"/></text:p>
      <text:p text:style-name="P1016">22,44 <text:s/>In preda all'angoscia, pregava più intensamente; e il suo sudore diventò come gocce di sangue che <text:s/>cadevano a terra. <text:s text:c="2"/></text:p>
      <text:p text:style-name="P1017">22,45 <text:s/>Poi, rialzatosi dalla preghiera, andò dai discepoli e li trovò che dormivano per la tristezza. <text:s text:c="2"/></text:p>
      <text:p text:style-name="P1018">22,46 <text:s/>E disse loro: "Perché dormite? Alzatevi e pregate, per non entrare in tentazione". <text:s text:c="2"/></text:p>
      <text:soft-page-break/>
      <text:p text:style-name="P1019">22,47 <text:s/>Mentre egli ancora parlava, ecco una turba di gente; li precedeva colui che si chiamava Giuda, <text:s/>uno dei Dodici, e si accostò a Gesù per baciarlo. <text:s text:c="2"/></text:p>
      <text:p text:style-name="P1020">22,48 <text:s/>Gesù gli disse: "Giuda, con un bacio tradisci il Figlio dell'uomo?". <text:s text:c="2"/></text:p>
      <text:p text:style-name="P1021">22,49 <text:s/>Allora quelli che eran con lui, vedendo ciò che stava per accadere, dissero: "Signore, dobbiamo <text:s/>colpire con la spada?". <text:s text:c="2"/></text:p>
      <text:p text:style-name="P1022">22,50 <text:s/>E uno di loro colpì il servo del sommo sacerdote e gli staccò l'orecchio destro. <text:s text:c="2"/></text:p>
      <text:p text:style-name="P1023">22,51 <text:s/>Ma Gesù intervenne dicendo: "Lasciate, basta così!". E toccandogli l'orecchio, lo guarì. <text:s text:c="2"/></text:p>
      <text:p text:style-name="P1024">22,52 <text:s/>Poi Gesù disse a coloro che gli eran venuti contro, sommi sacerdoti, capi delle guardie del <text:s/>tempio e anziani: "Siete usciti con spade e bastoni come contro un brigante? <text:s text:c="2"/></text:p>
      <text:p text:style-name="P1025">22,53 <text:s/>Ogni giorno ero con voi nel tempio e non avete steso le mani contro di me; ma questa è la vostra <text:s/>ora, è l'impero delle tenebre". <text:s text:c="2"/></text:p>
      <text:p text:style-name="P1026">22,54 <text:s/>Dopo averlo preso, lo condussero via e lo fecero entrare nella casa del sommo sacerdote. Pietro <text:s/>lo seguiva da lontano. <text:s text:c="2"/></text:p>
      <text:p text:style-name="P1027">22,55 <text:s/>Siccome avevano acceso un fuoco in mezzo al cortile e si erano seduti attorno, anche Pietro si <text:s/>sedette in mezzo a loro. <text:s text:c="2"/></text:p>
      <text:p text:style-name="P1028">22,56 <text:s/>Vedutolo seduto presso la fiamma, una serva fissandolo disse: "Anche questi era con lui". <text:s text:c="2"/></text:p>
      <text:p text:style-name="P1029">22,57 <text:s/>Ma egli negò dicendo: "Donna, non lo conosco!". <text:s text:c="2"/></text:p>
      <text:p text:style-name="P1030">22,58 <text:s/>Poco dopo un altro lo vide e disse: "Anche tu sei di loro!". Ma Pietro rispose: "No, non lo <text:s/>sono!". <text:s text:c="2"/></text:p>
      <text:p text:style-name="P1031">22,59 <text:s/>Passata circa un'ora, un altro insisteva: "In verità, anche questo era con lui; è anche lui un <text:s/>Galileo". <text:s text:c="2"/></text:p>
      <text:p text:style-name="P1032">22,60 <text:s/>Ma Pietro disse: "O uomo, non so quello che dici". E in quell'istante, mentre ancora parlava, un <text:s/>gallo cantò. <text:s text:c="2"/></text:p>
      <text:p text:style-name="P1033">22,61 <text:s/>Allora il Signore, voltatosi, guardò Pietro, e Pietro si ricordò delle parole che il Signore gli <text:s/>aveva detto: "Prima che il gallo canti, oggi mi rinnegherai tre volte". <text:s text:c="2"/></text:p>
      <text:p text:style-name="P1034">22,62 <text:s/>E, uscito, pianse amaramente. <text:s text:c="2"/></text:p>
      <text:p text:style-name="P1035">22,63 <text:s/>Frattanto gli uomini che avevano in custodia Gesù lo schernivano e lo percuotevano, <text:s text:c="2"/></text:p>
      <text:p text:style-name="P1036">22,64 <text:s/>lo bendavano e gli dicevano: "Indovina: chi ti ha colpito?". <text:s text:c="2"/></text:p>
      <text:p text:style-name="P1037">22,65 <text:s/>E molti altri insulti dicevano contro di lui. <text:s text:c="2"/></text:p>
      <text:p text:style-name="P1038">22,66 <text:s/>Appena fu giorno, si riunì il consiglio degli anziani del popolo, con i sommi sacerdoti e gli <text:s/>scribi; lo condussero davanti al sinedrio e gli dissero: <text:s text:c="2"/></text:p>
      <text:p text:style-name="P1039">22,67 <text:s/>"Se tu sei il Cristo, diccelo". Gesù rispose: "Anche se ve lo dico, non mi crederete; <text:s text:c="2"/></text:p>
      <text:p text:style-name="P1040">22,68 <text:s/>se vi interrogo, non mi risponderete. <text:s text:c="2"/></text:p>
      <text:p text:style-name="P1041">22,69 <text:s/>Ma da questo momento starà il Figlio dell'uomo seduto alla destra della potenza di Dio". <text:s text:c="2"/></text:p>
      <text:p text:style-name="P1042">22,70 <text:s/>Allora tutti esclamarono: "Tu dunque sei il Figlio di Dio?". Ed egli disse loro: "Lo dite voi <text:s/>stessi: io lo sono". <text:s text:c="2"/></text:p>
      <text:p text:style-name="P1043">22,71 <text:s/>Risposero: "Che bisogno abbiamo ancora di testimonianza? L'abbiamo udito noi stessi dalla sua <text:s/>bocca". <text:s text:c="2"/></text:p>
      <text:p text:style-name="P1044">23,1 <text:s/>Tutta l'assemblea si alzò, lo condussero da Pilato <text:s text:c="2"/></text:p>
      <text:p text:style-name="P1045">23,2 <text:s/>e cominciarono ad accusarlo: "Abbiamo trovato costui che sobillava il nostro popolo, impediva di <text:s/>dare tributi a Cesare e affermava di essere il Cristo re". <text:s text:c="2"/></text:p>
      <text:soft-page-break/>
      <text:p text:style-name="P1046">23,3 <text:s/>Pilato lo interrogò: "Sei tu il re dei Giudei?". Ed egli rispose: "Tu lo dici". <text:s text:c="2"/></text:p>
      <text:p text:style-name="P1047">23,4 <text:s/>Pilato disse ai sommi sacerdoti e alla folla: "Non trovo nessuna colpa in quest'uomo". <text:s text:c="2"/></text:p>
      <text:p text:style-name="P1048">23,5 <text:s/>Ma essi insistevano: "Costui solleva il popolo, insegnando per tutta la Giudea, dopo aver <text:s/>cominciato dalla Galilea fino a qui". <text:s text:c="2"/></text:p>
      <text:p text:style-name="P1049">23,6 <text:s/>Udito ciò, Pilato domandò se era Galileo <text:s text:c="2"/></text:p>
      <text:p text:style-name="P1050">23,7 <text:s/>e, saputo che apparteneva alla giurisdizione di Erode, lo mandò da Erode che in quei giorni si <text:s/>trovava anch'egli a Gerusalemme. <text:s text:c="2"/></text:p>
      <text:p text:style-name="P1051">23,8 <text:s/>Vedendo Gesù, Erode si rallegrò molto, perché da molto tempo desiderava vederlo per averne <text:s/>sentito parlare e sperava di vedere qualche miracolo fatto da lui. <text:s text:c="2"/></text:p>
      <text:p text:style-name="P1052">23,9 <text:s/>Lo interrogò con molte domande, ma Gesù non gli rispose nulla. <text:s text:c="2"/></text:p>
      <text:p text:style-name="P1053">23,10 <text:s/>C'erano là anche i sommi sacerdoti e gli scribi, e lo accusavano con insistenza. <text:s text:c="2"/></text:p>
      <text:p text:style-name="P1054">23,11 <text:s/>Allora Erode, con i suoi soldati, lo insultò e lo schernì, poi lo rivestì di una splendida veste <text:s/>e lo rimandò a Pilato. <text:s text:c="2"/></text:p>
      <text:p text:style-name="P1055">23,12 <text:s/>In quel giorno Erode e Pilato diventarono amici; prima infatti c'era stata inimicizia tra loro. <text:s text:c="2"/></text:p>
      <text:p text:style-name="P1056">23,13 <text:s/>Pilato, riuniti i sommi sacerdoti, le autorità e il popolo, <text:s text:c="2"/></text:p>
      <text:p text:style-name="P1057">23,14 <text:s/>disse: "Mi avete portato quest'uomo come sobillatore del popolo; ecco, l'ho esaminato davanti a <text:s/>voi, ma non ho trovato in lui nessuna colpa di quelle di cui lo accusate; <text:s text:c="2"/></text:p>
      <text:p text:style-name="P1058">23,15 <text:s/>e neanche Erode, infatti ce l'ha rimandato. Ecco, egli non ha fatto nulla che meriti la morte. <text:s text:c="2"/></text:p>
      <text:p text:style-name="P1059">23,16 <text:s/>Perciò, dopo averlo severamente castigato, lo rilascerò". <text:s text:c="2"/></text:p>
      <text:p text:style-name="P1060">23,17 <text:s/>[] <text:s text:c="2"/></text:p>
      <text:p text:style-name="P1061">23,18 <text:s/>Ma essi si misero a gridare tutti insieme: "A morte costui! Dacci libero Barabba!". <text:s text:c="2"/></text:p>
      <text:p text:style-name="P1062">23,19 <text:s/>Questi era stato messo in carcere per una sommossa scoppiata in città e per omicidio. <text:s text:c="2"/></text:p>
      <text:p text:style-name="P1063">23,20 <text:s/>Pilato parlò loro di nuovo, volendo rilasciare Gesù. <text:s text:c="2"/></text:p>
      <text:p text:style-name="P1064">23,21 <text:s/>Ma essi urlavano: "Crocifiggilo, crocifiggilo!". <text:s text:c="2"/></text:p>
      <text:p text:style-name="P1065">23,22 <text:s/>Ed egli, per la terza volta, disse loro: "Ma che male ha fatto costui? Non ho trovato nulla in <text:s/>lui che meriti la morte. Lo castigherò severamente e poi lo rilascerò". <text:s text:c="2"/></text:p>
      <text:p text:style-name="P1066">23,23 <text:s/>Essi però insistevano a gran voce, chiedendo che venisse crocifisso; e le loro grida crescevano. <text:s text:c="2"/></text:p>
      <text:p text:style-name="P1067">23,24 <text:s/>Pilato allora decise che la loro richiesta fosse eseguita. <text:s text:c="2"/></text:p>
      <text:p text:style-name="P1068">23,25 <text:s/>Rilasciò colui che era stato messo in carcere per sommossa e omicidio e che essi richiedevano, e <text:s/>abbandonò Gesù alla loro volontà. <text:s text:c="2"/></text:p>
      <text:p text:style-name="P1069">23,26 <text:s/>Mentre lo conducevano via, presero un certo Simone di Cirène che veniva dalla campagna e gli <text:s/>misero addosso la croce da portare dietro a Gesù. <text:s text:c="2"/></text:p>
      <text:p text:style-name="P1070">23,27 <text:s/>Lo seguiva una gran folla di popolo e di donne che si battevano il petto e facevano lamenti su di <text:s/>lui. <text:s text:c="2"/></text:p>
      <text:p text:style-name="P1071">23,28 <text:s/>Ma Gesù, voltandosi verso le donne, disse: "Figlie di Gerusalemme, non piangete su di me, ma <text:s/>piangete su voi stesse e sui vostri figli. <text:s text:c="2"/></text:p>
      <text:p text:style-name="P1072">23,29 <text:s/>Ecco, verranno giorni nei quali si dirà: Beate le sterili e i grembi che non hanno generato e le <text:s/>mammelle che non hanno allattato. <text:s text:c="2"/></text:p>
      <text:soft-page-break/>
      <text:p text:style-name="P1073">23,30 <text:s/>Allora cominceranno a dire ai monti: Cadete su di noi! e ai colli: Copriteci! <text:s text:c="2"/></text:p>
      <text:p text:style-name="P1074">23,31 <text:s/>Perché se trattano così il legno verde, che avverrà del legno secco?". <text:s text:c="2"/></text:p>
      <text:p text:style-name="P1075">23,32 <text:s/>Venivano condotti insieme con lui anche due malfattori per essere giustiziati. <text:s text:c="2"/></text:p>
      <text:p text:style-name="P1076">23,33 <text:s/>Quando giunsero al luogo detto Cranio, là crocifissero lui e i due malfattori, uno a destra e <text:s/>l'altro a sinistra. <text:s text:c="2"/></text:p>
      <text:p text:style-name="P1077">23,34 <text:s/>Gesù diceva: "Padre, perdonali, perché non sanno quello che fanno". Dopo essersi poi divise le <text:s/>sue vesti, le tirarono a sorte. <text:s text:c="2"/></text:p>
      <text:p text:style-name="P1078">23,35 <text:s/>Il popolo stava a vedere, i capi invece lo schernivano dicendo: "Ha salvato gli altri, salvi se <text:s/>stesso, se è il Cristo di Dio, il suo eletto". <text:s text:c="2"/></text:p>
      <text:p text:style-name="P1079">23,36 <text:s/>Anche i soldati lo schernivano, e gli si accostavano per porgergli dell'aceto, e dicevano: <text:s text:c="2"/></text:p>
      <text:p text:style-name="P1080">23,37 <text:s/>"Se tu sei il re dei Giudei, salva te stesso". <text:s text:c="2"/></text:p>
      <text:p text:style-name="P1081">23,38 <text:s/>C'era anche una scritta, sopra il suo capo: Questi è il re dei Giudei. <text:s text:c="2"/></text:p>
      <text:p text:style-name="P1082">23,39 <text:s/>Uno dei malfattori appesi alla croce lo insultava: "Non sei tu il Cristo? Salva te stesso e anche <text:s/>noi!". <text:s text:c="2"/></text:p>
      <text:p text:style-name="P1083">23,40 <text:s/>Ma l'altro lo rimproverava: "Neanche tu hai timore di Dio, benché condannato alla stessa pena? <text:s text:c="2"/></text:p>
      <text:p text:style-name="P1084">23,41 <text:s/>Noi giustamente, perché riceviamo il giusto per le nostre azioni, egli invece non ha fatto nulla <text:s/>di male". <text:s text:c="2"/></text:p>
      <text:p text:style-name="P1085">23,42 <text:s/>E aggiunse: "Gesù, ricordati di me quando entrerai nel tuo regno". <text:s text:c="2"/></text:p>
      <text:p text:style-name="P1086">23,43 <text:s/>Gli rispose: "In verità ti dico, oggi sarai con me nel paradiso". <text:s text:c="2"/></text:p>
      <text:p text:style-name="P1087">23,44 <text:s/>Era verso mezzogiorno, quando il sole si eclissò e si fece buio su tutta la terra fino alle tre <text:s/>del pomeriggio. <text:s text:c="2"/></text:p>
      <text:p text:style-name="P1088">23,45 <text:s/>Il velo del tempio si squarciò nel mezzo. <text:s text:c="2"/></text:p>
      <text:p text:style-name="P1089">23,46 <text:s/>Gesù, gridando a gran voce, disse: "Padre, nelle tue mani consegno il mio spirito". Detto questo <text:s/>spirò. <text:s text:c="2"/></text:p>
      <text:p text:style-name="P1090">23,47 <text:s/>Visto ciò che era accaduto, il centurione glorificava Dio: "Veramente quest'uomo era giusto". <text:s text:c="2"/></text:p>
      <text:p text:style-name="P1091">23,48 <text:s/>Anche tutte le folle che erano accorse a questo spettacolo, ripensando a quanto era accaduto, se <text:s/>ne tornavano percuotendosi il petto. <text:s text:c="2"/></text:p>
      <text:p text:style-name="P1092">23,49 <text:s/>Tutti i suoi conoscenti assistevano da lontano e così le donne che lo avevano seguito fin dalla <text:s/>Galilea, osservando questi avvenimenti. <text:s text:c="2"/></text:p>
      <text:p text:style-name="P1093">23,50 <text:s/>C'era un uomo di nome Giuseppe, membro del sinedrio, persona buona e giusta. <text:s text:c="2"/></text:p>
      <text:p text:style-name="P1094">23,51 <text:s/>Non aveva aderito alla decisione e all'operato degli altri. Egli era di Arimatèa, una città dei <text:s/>Giudei, e aspettava il regno di Dio. <text:s text:c="2"/></text:p>
      <text:p text:style-name="P1095">23,52 <text:s/>Si presentò a Pilato e chiese il corpo di Gesù. <text:s text:c="2"/></text:p>
      <text:p text:style-name="P1096">23,53 <text:s/>Lo calò dalla croce, lo avvolse in un lenzuolo e lo depose in una tomba scavata nella roccia, <text:s/>nella quale nessuno era stato ancora deposto. <text:s text:c="2"/></text:p>
      <text:p text:style-name="P1097">23,54 <text:s/>Era il giorno della parascève e già splendevano le luci del sabato. <text:s text:c="2"/></text:p>
      <text:p text:style-name="P1098">23,55 <text:s/>Le donne che erano venute con Gesù dalla Galilea seguivano Giuseppe; esse osservarono la tomba e <text:s/>come era stato deposto il corpo di Gesù, <text:s text:c="2"/></text:p>
      <text:p text:style-name="P1099">23,56 <text:s/>poi tornarono indietro e prepararono aromi e oli profumati. Il giorno di sabato osservarono il <text:s/>riposo secondo il comandamento. <text:s text:c="2"/></text:p>
      <text:p text:style-name="P1100">24,1 <text:s/>Il primo giorno dopo il sabato, di buon mattino, si recarono alla tomba, portando con sé gli <text:s/>aromi che avevano preparato. <text:s text:c="2"/></text:p>
      <text:soft-page-break/>
      <text:p text:style-name="P1101">24,2 <text:s/>Trovarono la pietra rotolata via dal sepolcro; <text:s text:c="2"/></text:p>
      <text:p text:style-name="P1102">24,3 <text:s/>ma, entrate, non trovarono il corpo del Signore Gesù. <text:s text:c="2"/></text:p>
      <text:p text:style-name="P1103">24,4 <text:s/>Mentre erano ancora incerte, ecco due uomini apparire vicino a loro in vesti sfolgoranti. <text:s text:c="2"/></text:p>
      <text:p text:style-name="P1104">24,5 <text:s/>Essendosi le donne impaurite e avendo chinato il volto a terra, essi dissero loro: "Perché <text:s/>cercate tra i morti colui che è vivo? <text:s text:c="2"/></text:p>
      <text:p text:style-name="P1105">24,6 <text:s/>Non è qui, è risuscitato. Ricordatevi come vi parlò quando era ancora in Galilea, <text:s text:c="2"/></text:p>
      <text:p text:style-name="P1106">24,7 <text:s/>dicendo che bisognava che il Figlio dell'uomo fosse consegnato in mano ai peccatori, che fosse <text:s/>crocifisso e risuscitasse il terzo giorno". <text:s text:c="2"/></text:p>
      <text:p text:style-name="P1107">24,8 <text:s/>Ed esse si ricordarono delle sue parole. <text:s text:c="2"/></text:p>
      <text:p text:style-name="P1108">24,9 <text:s/>E, tornate dal sepolcro, annunziarono tutto questo agli Undici e a tutti gli altri. <text:s text:c="2"/></text:p>
      <text:p text:style-name="P1109">24,10 <text:s/>Erano Maria di Màgdala, Giovanna e Maria di Giacomo. Anche le altre che erano insieme lo <text:s/>raccontarono agli apostoli. <text:s text:c="2"/></text:p>
      <text:p text:style-name="P1110">24,11 <text:s/>Quelle parole parvero loro come un vaneggiamento e non credettero ad esse. <text:s text:c="2"/></text:p>
      <text:p text:style-name="P1111">24,12 <text:s/>Pietro tuttavia corse al sepolcro e chinatosi vide solo le bende. E tornò a casa pieno di stupore <text:s/>per l'accaduto. <text:s text:c="2"/></text:p>
      <text:p text:style-name="P1112">24,13 <text:s/>Ed ecco in quello stesso giorno due di loro erano in cammino per un villaggio distante circa <text:s/>sette miglia da Gerusalemme, di nome Emmaus, <text:s text:c="2"/></text:p>
      <text:p text:style-name="P1113">24,14 <text:s/>e conversavano di tutto quello che era accaduto. <text:s text:c="2"/></text:p>
      <text:p text:style-name="P1114">24,15 <text:s/>Mentre discorrevano e discutevano insieme, Gesù in persona si accostò e camminava con loro. <text:s text:c="2"/></text:p>
      <text:p text:style-name="P1115">24,16 <text:s/>Ma i loro occhi erano incapaci di riconoscerlo. <text:s text:c="2"/></text:p>
      <text:p text:style-name="P1116">24,17 <text:s/>Ed egli disse loro: "Che sono questi discorsi che state facendo fra voi durante il cammino?". Si <text:s/>fermarono, col volto triste; <text:s text:c="2"/></text:p>
      <text:p text:style-name="P1117">24,18 <text:s/>uno di loro, di nome Clèopa, gli disse: "Tu solo sei così forestiero in Gerusalemme da non sapere <text:s/>ciò che vi è accaduto in questi giorni?". <text:s text:c="2"/></text:p>
      <text:p text:style-name="P1118">24,19 <text:s/>Domandò: "Che cosa?". Gli risposero: "Tutto ciò che riguarda Gesù Nazareno, che fu profeta <text:s/>potente in opere e in parole, davanti a Dio e a tutto il popolo; <text:s text:c="2"/></text:p>
      <text:p text:style-name="P1119">24,20 <text:s/>come i sommi sacerdoti e i nostri capi lo hanno consegnato per farlo condannare a morte e poi <text:s/>l'hanno crocifisso. <text:s text:c="2"/></text:p>
      <text:p text:style-name="P1120">24,21 <text:s/>Noi speravamo che fosse lui a liberare Israele; con tutto ciò son passati tre giorni da quando <text:s/>queste cose sono accadute. <text:s text:c="2"/></text:p>
      <text:p text:style-name="P1121">24,22 <text:s/>Ma alcune donne, delle nostre, ci hanno sconvolti; recatesi al mattino al sepolcro <text:s text:c="2"/></text:p>
      <text:p text:style-name="P1122">24,23 <text:s/>e non avendo trovato il suo corpo, son venute a dirci di aver avuto anche una visione di angeli, <text:s/>i quali affermano che egli è vivo. <text:s text:c="2"/></text:p>
      <text:p text:style-name="P1123">24,24 <text:s/>Alcuni dei nostri sono andati al sepolcro e hanno trovato come avevan detto le donne, ma lui non <text:s/>l'hanno visto". <text:s text:c="2"/></text:p>
      <text:p text:style-name="P1124">24,25 <text:s/>Ed egli disse loro: "Stolti e tardi di cuore nel credere alla parola dei profeti! <text:s text:c="2"/></text:p>
      <text:p text:style-name="P1125">24,26 <text:s/>Non bisognava che il Cristo sopportasse queste sofferenze per entrare nella sua gloria?". <text:s text:c="2"/></text:p>
      <text:p text:style-name="P1126">24,27 <text:s/>E cominciando da Mosè e da tutti i profeti spiegò loro in tutte le Scritture ciò che si riferiva <text:s/>a lui. <text:s text:c="2"/></text:p>
      <text:p text:style-name="P1127">24,28 <text:s/>Quando furon vicini al villaggio dove erano diretti, egli fece come se dovesse andare più <text:s/>lontano. <text:s text:c="2"/></text:p>
      <text:soft-page-break/>
      <text:p text:style-name="P1128">24,29 <text:s/>Ma essi insistettero: "Resta con noi perché si fa sera e il giorno già volge al declino". Egli <text:s/>entrò per rimanere con loro. <text:s text:c="2"/></text:p>
      <text:p text:style-name="P1129">24,30 <text:s/>Quando fu a tavola con loro, prese il pane, disse la benedizione, lo spezzò e lo diede loro. <text:s text:c="2"/></text:p>
      <text:p text:style-name="P1130">24,31 <text:s/>Ed ecco si aprirono loro gli occhi e lo riconobbero. Ma lui sparì dalla loro vista. <text:s text:c="2"/></text:p>
      <text:p text:style-name="P1131">24,32 <text:s/>Ed essi si dissero l'un l'altro: "Non ci ardeva forse il cuore nel petto mentre conversava con <text:s/>noi lungo il cammino, quando ci spiegava le Scritture?". <text:s text:c="2"/></text:p>
      <text:p text:style-name="P1132">24,33 <text:s/>E partirono senz'indugio e fecero ritorno a Gerusalemme, dove trovarono riuniti gli Undici e gli <text:s/>altri che erano con loro, <text:s text:c="2"/></text:p>
      <text:p text:style-name="P1133">24,34 <text:s/>i quali dicevano: "Davvero il Signore è risorto ed è apparso a Simone". <text:s text:c="2"/></text:p>
      <text:p text:style-name="P1134">24,35 <text:s/>Essi poi riferirono ciò che era accaduto lungo la via e come l'avevano riconosciuto nello <text:s/>spezzare il pane. <text:s text:c="2"/></text:p>
      <text:p text:style-name="P1135">24,36 <text:s/>Mentre essi parlavano di queste cose, Gesù in persona apparve in mezzo a loro e disse: "Pace a <text:s/>voi!". <text:s text:c="2"/></text:p>
      <text:p text:style-name="P1136">24,37 <text:s/>Stupiti e spaventati credevano di vedere un fantasma. <text:s text:c="2"/></text:p>
      <text:p text:style-name="P1137">24,38 <text:s/>Ma egli disse: "Perché siete turbati, e perché sorgono dubbi nel vostro cuore? <text:s text:c="2"/></text:p>
      <text:p text:style-name="P1138">24,39 <text:s/>Guardate le mie mani e i miei piedi: sono proprio io! Toccatemi e guardate; un fantasma non ha <text:s/>carne e ossa come vedete che io ho". <text:s text:c="2"/></text:p>
      <text:p text:style-name="P1139">24,40 <text:s/>Dicendo questo, mostrò loro le mani e i piedi. <text:s text:c="2"/></text:p>
      <text:p text:style-name="P1140">24,41 <text:s/>Ma poiché per la grande gioia ancora non credevano ed erano stupefatti, disse: "Avete qui qualche <text:s/>cosa da mangiare?". <text:s text:c="2"/></text:p>
      <text:p text:style-name="P1141">24,42 <text:s/>Gli offrirono una porzione di pesce arrostito; <text:s text:c="2"/></text:p>
      <text:p text:style-name="P1142">24,43 <text:s/>egli lo prese e lo mangiò davanti a loro. <text:s text:c="2"/></text:p>
      <text:p text:style-name="P1143">24,44 <text:s/>Poi disse: "Sono queste le parole che vi dicevo quando ero ancora con voi: bisogna che si <text:s/>compiano tutte le cose scritte su di me nella Legge di Mosè, nei Profeti e nei Salmi". <text:s text:c="2"/></text:p>
      <text:p text:style-name="P1144">24,45 <text:s/>Allora aprì loro la mente all'intelligenza delle Scritture e disse: <text:s text:c="2"/></text:p>
      <text:p text:style-name="P1145">24,46 <text:s/>"Così sta scritto: il Cristo dovrà patire e risuscitare dai morti il terzo giorno <text:s text:c="2"/></text:p>
      <text:p text:style-name="P1146">24,47 <text:s/>e nel suo nome saranno predicati a tutte le genti la conversione e il perdono dei peccati, <text:s/>cominciando da Gerusalemme. <text:s text:c="2"/></text:p>
      <text:p text:style-name="P1147">24,48 <text:s/>Di questo voi siete testimoni. <text:s text:c="2"/></text:p>
      <text:p text:style-name="P1148">24,49 <text:s/>E io manderò su di voi quello che il Padre mio ha promesso; ma voi restate in città, finché non <text:s/>siate rivestiti di potenza dall'alto". <text:s text:c="2"/></text:p>
      <text:p text:style-name="P1149">24,50 <text:s/>Poi li condusse fuori verso Betània e, alzate le mani, li benedisse. <text:s text:c="2"/></text:p>
      <text:p text:style-name="P1150">24,51 <text:s/>Mentre li benediceva, si staccò da loro e fu portato verso il cielo. <text:s text:c="2"/></text:p>
      <text:p text:style-name="P1151">24,52 <text:s/>Ed essi, dopo averlo adorato, tornarono a Gerusalemme con grande gioia; <text:s text:c="2"/></text:p>
      <text:p text:style-name="Normale"><text:span text:style-name="T1152">24,53 <text:s/>e stavano sempre nel tempio lodando Dio.</text:span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New,Bold" svg:font-family="CourierNew,Bold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ianfranco Fronteddu</meta:initial-creator>
    <dc:creator>Gianfranco Fronteddu</dc:creator>
    <meta:creation-date>2026-07-07T15:20:00Z</meta:creation-date>
    <dc:date>2026-07-07T15:20:00Z</dc:date>
    <meta:template xlink:href="Normal.dotm" xlink:type="simple"/>
    <meta:editing-cycles>2</meta:editing-cycles>
    <meta:editing-duration>PT60S</meta:editing-duration>
    <meta:document-statistic meta:page-count="44" meta:paragraph-count="266" meta:word-count="19951" meta:character-count="133412" meta:row-count="947" meta:non-whitespace-character-count="113727"/>
  </office:meta>
</office:document-meta>
</file>